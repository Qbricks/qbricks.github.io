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3.9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0.771cm"/>
    </style:style>
    <style:style style:name="co19" style:family="table-column">
      <style:table-column-properties fo:break-before="auto" style:column-width="5.101cm"/>
    </style:style>
    <style:style style:name="co20" style:family="table-column">
      <style:table-column-properties fo:break-before="auto" style:column-width="0.988cm"/>
    </style:style>
    <style:style style:name="co21" style:family="table-column">
      <style:table-column-properties fo:break-before="auto" style:column-width="6.544cm"/>
    </style:style>
    <style:style style:name="co22" style:family="table-column">
      <style:table-column-properties fo:break-before="auto" style:column-width="3.875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4.528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2.485cm"/>
    </style:style>
    <style:style style:name="co27" style:family="table-column">
      <style:table-column-properties fo:break-before="auto" style:column-width="7.442cm"/>
    </style:style>
    <style:style style:name="co28" style:family="table-column">
      <style:table-column-properties fo:break-before="auto" style:column-width="1.859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2.921cm"/>
    </style:style>
    <style:style style:name="co31" style:family="table-column">
      <style:table-column-properties fo:break-before="auto" style:column-width="0.826cm"/>
    </style:style>
    <style:style style:name="co32" style:family="table-column">
      <style:table-column-properties fo:break-before="auto" style:column-width="0.933cm"/>
    </style:style>
    <style:style style:name="co33" style:family="table-column">
      <style:table-column-properties fo:break-before="auto" style:column-width="1.752cm"/>
    </style:style>
    <style:style style:name="co34" style:family="table-column">
      <style:table-column-properties fo:break-before="auto" style:column-width="1.207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Bad" style:base-cell-address="totals.H6"/>
    </style:style>
    <style:style style:name="ce26" style:family="table-cell" style:parent-style-name="Default">
      <style:map style:condition="cell-content()&gt;0" style:apply-style-name="Bad" style:base-cell-address="totals.H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Bad" style:base-cell-address="totals.H6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&gt;0" style:apply-style-name="Bad" style:base-cell-address="totals.H6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40" style:family="table-cell" style:parent-style-name="Default" style:data-style-name="N2">
      <style:table-cell-properties fo:background-color="#ff8080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ood" style:base-cell-address="totals.O4"/>
      <style:map style:condition="cell-content()=0" style:apply-style-name="Bad" style:base-cell-address="totals.O4"/>
      <style:map style:condition="cell-content()=0" style:apply-style-name="Accent" style:base-cell-address="totals.O4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1" style:apply-style-name="Good" style:base-cell-address="totals.O4"/>
      <style:map style:condition="cell-content()=0" style:apply-style-name="Bad" style:base-cell-address="totals.O4"/>
      <style:map style:condition="cell-content()=0" style:apply-style-name="Accent" style:base-cell-address="totals.O4"/>
    </style:style>
    <style:style style:name="ce69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map style:condition="cell-content()=1" style:apply-style-name="Good" style:base-cell-address="totals.O4"/>
      <style:map style:condition="cell-content()=0" style:apply-style-name="Bad" style:base-cell-address="totals.O4"/>
      <style:map style:condition="cell-content()=0" style:apply-style-name="Accent" style:base-cell-address="totals.O4"/>
    </style:style>
    <style:style style:name="ce80" style:family="table-cell" style:parent-style-name="Default">
      <style:map style:condition="cell-content()=1" style:apply-style-name="Good" style:base-cell-address="totals.O4"/>
      <style:map style:condition="cell-content()=0" style:apply-style-name="Bad" style:base-cell-address="totals.O4"/>
      <style:map style:condition="cell-content()=0" style:apply-style-name="Accent" style:base-cell-address="totals.O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map style:condition="cell-content()&gt;0" style:apply-style-name="Bad" style:base-cell-address="totals.V7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Bad" style:base-cell-address="totals.V7"/>
    </style:style>
    <style:style style:name="ce7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  <style:map style:condition="cell-content()=1" style:apply-style-name="Good" style:base-cell-address="totals.O4"/>
      <style:map style:condition="cell-content()=0" style:apply-style-name="Bad" style:base-cell-address="totals.O4"/>
      <style:map style:condition="cell-content()=0" style:apply-style-name="Accent" style:base-cell-address="totals.O4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(U)-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</table:table>
      <table:table table:name="T(U)-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table:number-columns-repeated="13"/>
        </table:table-row>
      </table:table>
      <table:table table:name="U-DC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" table:default-cell-style-name="ce1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C-Q(DC)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3" table:default-cell-style-name="ce1"/>
        <table:table-column table:style-name="co1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(DC)-Q(DC)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</table:table>
      <table:table table:name="O(U)-T(U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</table:table>
      <table:table table:name="sanity-uni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</table:table>
      <table:table table:name="sanity-hybrid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" table:default-cell-style-name="ce1"/>
        <table:table-column table:style-name="co17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anity-partial" table:style-name="ta1">
        <office:forms form:automatic-focus="false" form:apply-design-mode="false"/>
        <table:table-column table:style-name="co27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4"/>
        </table:table-row>
      </table:table>
      <table:table table:name="totals" table:style-name="ta1">
        <table:table-column table:style-name="co28" table:default-cell-style-name="ce45"/>
        <table:table-column table:style-name="co29" table:default-cell-style-name="ce49"/>
        <table:table-column table:style-name="co17" table:default-cell-style-name="ce53"/>
        <table:table-column table:style-name="co30" table:default-cell-style-name="ce45"/>
        <table:table-column table:style-name="co6" table:number-columns-repeated="2" table:default-cell-style-name="Default"/>
        <table:table-column table:style-name="co31" table:number-columns-repeated="2" table:default-cell-style-name="Default"/>
        <table:table-column table:style-name="co6" table:default-cell-style-name="Default"/>
        <table:table-column table:style-name="co32" table:default-cell-style-name="Default"/>
        <table:table-column table:style-name="co14" table:default-cell-style-name="ce59"/>
        <table:table-column table:style-name="co33" table:default-cell-style-name="ce59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5" table:number-columns-repeated="6" table:default-cell-style-name="Default"/>
        <table:table-column table:style-name="co35" table:default-cell-style-name="ce59"/>
        <table:table-column table:style-name="co35" table:number-columns-repeated="3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2" table:number-columns-repeated="2" table:default-cell-style-name="Default"/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 table:style-name="ce8" office:value-type="string" calcext:value-type="string" table:number-columns-spanned="10" table:number-rows-spanned="1">
            <text:p>'Err’: Incorrect result, indicate 'equiv.' instead of 'not equiv.'</text:p>
          </table:table-cell>
          <table:covered-table-cell table:style-name="ce17"/>
          <table:covered-table-cell table:number-columns-repeated="7" table:style-name="ce20"/>
          <table:covered-table-cell table:style-name="ce40"/>
          <table:table-cell table:style-name="Default"/>
          <table:table-cell table:number-columns-repeated="24"/>
        </table:table-row>
        <table:table-row table:style-name="ro1">
          <table:table-cell table:style-name="ce3" office:value-type="string" calcext:value-type="string" table:number-columns-spanned="15" table:number-rows-spanned="3">
            <text:p>Sanity Unitary - Total : 42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11"/>
          <table:table-cell/>
          <table:table-cell table:style-name="ce3" office:value-type="string" calcext:value-type="string" table:number-columns-spanned="15" table:number-rows-spanned="3">
            <text:p>O(U)-U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4"/>
          <table:table-cell table:number-columns-repeated="5"/>
        </table:table-row>
        <table:table-row table:style-name="ro1"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3" office:value-type="string" calcext:value-type="string">
            <text:p>Tool</text:p>
          </table:table-cell>
          <table:table-cell table:style-name="ce48" office:value-type="string" calcext:value-type="string">
            <text:p>Version</text:p>
          </table:table-cell>
          <table:table-cell table:style-name="ce43" office:value-type="string" calcext:value-type="string">
            <text:p>Lift</text:p>
          </table:table-cell>
          <table:table-cell table:style-name="ce43" office:value-type="string" calcext:value-type="string">
            <text:p>Opt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25" office:value-type="string" calcext:value-type="string">
            <text:p>Err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61" office:value-type="string" calcext:value-type="string">
            <text:p>TT</text:p>
          </table:table-cell>
          <table:table-cell table:style-name="ce64" office:value-type="string" calcext:value-type="string">
            <text:p>AT</text:p>
          </table:table-cell>
          <table:table-cell table:style-name="ce65" office:value-type="string" calcext:value-type="string">
            <text:p>Greet</text:p>
          </table:table-cell>
          <table:table-cell table:style-name="ce6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4" office:value-type="string" calcext:value-type="string">
            <text:p>Greet</text:p>
          </table:table-cell>
          <table:table-cell table:style-name="ce84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3" office:value-type="string" calcext:value-type="string">
            <text:p>AutoQ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tandalone</text:p>
          </table:table-cell>
          <table:table-cell table:style-name="Default" office:value-type="string" calcext:value-type="string">
            <text:p>None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&quot;NS&quot;)+COUNTIFS([$'sanity-unit'.$C$1:$'sanity-unit'.$C$1048576];[.$A7];[$'sanity-unit'.$D$1:$'sanity-unit'.$D$1048576];[.$B7];[$'sanity-unit'.$E$1:$'sanity-unit'.$E$1048576];[.$C7];[$'sanity-unit'.$F$1:$'sanity-unit'.$F$1048576];[.$D7];[$'sanity-unit'.$N$1:$'sanity-unit'.$N$1048576];&quot;NS1&quot;)+COUNTIFS([$'sanity-unit'.$C$1:$'sanity-unit'.$C$1048576];[.$A7];[$'sanity-unit'.$D$1:$'sanity-unit'.$D$1048576];[.$B7];[$'sanity-unit'.$E$1:$'sanity-unit'.$E$1048576];[.$C7];[$'sanity-unit'.$F$1:$'sanity-unit'.$F$1048576];[.$D7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7];[$'sanity-unit'.$D$1:$'sanity-unit'.$D$1048576];[.$B7];[$'sanity-unit'.$E$1:$'sanity-unit'.$E$1048576];[.$C7];[$'sanity-unit'.$F$1:$'sanity-unit'.$F$1048576];[.$D7])" office:value-type="float" office:value="0" calcext:value-type="float">
            <text:p>0,00</text:p>
          </table:table-cell>
          <table:table-cell table:style-name="Default" table:formula="of:=[.K7]/[.H7]" office:value-type="string" office:string-value="" calcext:value-type="error">
            <text:p>#DIV/0!</text:p>
          </table:table-cell>
          <table:table-cell table:formula="of:=SUM([.E7:.J7])" office:value-type="float" office:value="0" calcext:value-type="float">
            <text:p>0</text:p>
          </table:table-cell>
          <table:table-cell table:formula="of:=COUNTIFS([$'sanity-unit'.$C$1:$'sanity-unit'.$C$1048576];[.$A7];[$'sanity-unit'.$D$1:$'sanity-unit'.$D$1048576];[.$B7];[$'sanity-unit'.$E$1:$'sanity-unit'.$E$1048576];[.$C7];[$'sanity-unit'.$F$1:$'sanity-unit'.$F$1048576];[.$D7] )" office:value-type="float" office:value="0" calcext:value-type="float">
            <text:p>0</text:p>
          </table:table-cell>
          <table:table-cell table:style-name="ce69" table:formula="of:=[.M7]=[.N7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formula="of:=COUNTIFS([$'O(U)-U'.$B$1:$'O(U)-U'.$B$1048576];[.$Q7];[$'O(U)-U'.$C$1:$'O(U)-U'.$C$1048576];[.$R7];[$'O(U)-U'.$D$1:$'O(U)-U'.$D$1048576];[.$S7];[$'O(U)-U'.$E$1:$'O(U)-U'.$E$1048576];[.$T7];[$'O(U)-U'.$M$1:$'O(U)-U'.$M$1048576];&quot;&gt;=0&quot;)" office:value-type="float" office:value="0" calcext:value-type="float">
            <text:p>0</text:p>
          </table:table-cell>
          <table:table-cell table:style-name="ce52" table:formula="of:=COUNTIFS([$'O(U)-U'.$B$1:$'O(U)-U'.$B$1048576];[.$Q7];[$'O(U)-U'.$C$1:$'O(U)-U'.$C$1048576];[.$R7];[$'O(U)-U'.$D$1:$'O(U)-U'.$D$1048576];[.$S7];[$'O(U)-U'.$E$1:$'O(U)-U'.$E$1048576];[.$T7];[$'O(U)-U'.$M$1:$'O(U)-U'.$M$1048576];[.V$6])" office:value-type="float" office:value="0" calcext:value-type="float">
            <text:p>0</text:p>
          </table:table-cell>
          <table:table-cell table:formula="of:=COUNTIFS([$'O(U)-U'.$B$1:$'O(U)-U'.$B$1048576];[.$Q7];[$'O(U)-U'.$C$1:$'O(U)-U'.$C$1048576];[.$R7];[$'O(U)-U'.$D$1:$'O(U)-U'.$D$1048576];[.$S7];[$'O(U)-U'.$E$1:$'O(U)-U'.$E$1048576];[.$T7];[$'O(U)-U'.$M$1:$'O(U)-U'.$M$1048576];[.W$6])" office:value-type="float" office:value="0" calcext:value-type="float">
            <text:p>0</text:p>
          </table:table-cell>
          <table:table-cell table:formula="of:=COUNTIFS([$'O(U)-U'.$B$1:$'O(U)-U'.$B$1048576];[.$Q7];[$'O(U)-U'.$C$1:$'O(U)-U'.$C$1048576];[.$R7];[$'O(U)-U'.$D$1:$'O(U)-U'.$D$1048576];[.$S7];[$'O(U)-U'.$E$1:$'O(U)-U'.$E$1048576];[.$T7];[$'O(U)-U'.$M$1:$'O(U)-U'.$M$1048576];&quot;NS&quot;)+COUNTIFS([$'O(U)-U'.$B$1:$'O(U)-U'.$B$1048576];[.$Q7];[$'O(U)-U'.$C$1:$'O(U)-U'.$C$1048576];[.$R7];[$'O(U)-U'.$D$1:$'O(U)-U'.$D$1048576];[.$S7];[$'O(U)-U'.$E$1:$'O(U)-U'.$E$1048576];[.$T7];[$'O(U)-U'.$M$1:$'O(U)-U'.$M$1048576];&quot;NS1&quot;)+COUNTIFS([$'O(U)-U'.$B$1:$'O(U)-U'.$B$1048576];[.$Q7];[$'O(U)-U'.$C$1:$'O(U)-U'.$C$1048576];[.$R7];[$'O(U)-U'.$D$1:$'O(U)-U'.$D$1048576];[.$S7];[$'O(U)-U'.$E$1:$'O(U)-U'.$E$1048576];[.$T7];[$'O(U)-U'.$M$1:$'O(U)-U'.$M$1048576];&quot;NS2&quot;)" office:value-type="float" office:value="0" calcext:value-type="float">
            <text:p>0</text:p>
          </table:table-cell>
          <table:table-cell table:formula="of:=COUNTIFS([$'O(U)-U'.$B$1:$'O(U)-U'.$B$1048576];[.$Q7];[$'O(U)-U'.$C$1:$'O(U)-U'.$C$1048576];[.$R7];[$'O(U)-U'.$D$1:$'O(U)-U'.$D$1048576];[.$S7];[$'O(U)-U'.$E$1:$'O(U)-U'.$E$1048576];[.$T7];[$'O(U)-U'.$M$1:$'O(U)-U'.$M$1048576];[.Y$6])" office:value-type="float" office:value="0" calcext:value-type="float">
            <text:p>0</text:p>
          </table:table-cell>
          <table:table-cell table:formula="of:=COUNTIFS([$'O(U)-U'.$B$1:$'O(U)-U'.$B$1048576];[.$Q7];[$'O(U)-U'.$C$1:$'O(U)-U'.$C$1048576];[.$R7];[$'O(U)-U'.$D$1:$'O(U)-U'.$D$1048576];[.$S7];[$'O(U)-U'.$E$1:$'O(U)-U'.$E$1048576];[.$T7];[$'O(U)-U'.$M$1:$'O(U)-U'.$M$1048576];[.Z$6])" office:value-type="float" office:value="0" calcext:value-type="float">
            <text:p>0</text:p>
          </table:table-cell>
          <table:table-cell table:formula="of:=SUMIFS([$'O(U)-U'.$M$1:$'O(U)-U'.$M$1048576];[$'O(U)-U'.$B$1:$'O(U)-U'.$B$1048576];[.$Q7];[$'O(U)-U'.$C$1:$'O(U)-U'.$C$1048576];[.$R7];[$'O(U)-U'.$D$1:$'O(U)-U'.$D$1048576];[.$S7];[$'O(U)-U'.$E$1:$'O(U)-U'.$E$1048576];[.$T7])" office:value-type="float" office:value="0" calcext:value-type="float">
            <text:p>0</text:p>
          </table:table-cell>
          <table:table-cell table:formula="of:=[.AA7]/[.U7]" office:value-type="string" office:string-value="" calcext:value-type="error">
            <text:p>#DIV/0!</text:p>
          </table:table-cell>
          <table:table-cell table:formula="of:=SUM([.U7:.Z7])" office:value-type="float" office:value="0" calcext:value-type="float">
            <text:p>0</text:p>
          </table:table-cell>
          <table:table-cell table:formula="of:=COUNTIFS([$'O(U)-U'.$B$1:$'O(U)-U'.$B$1048576];[.$Q7];[$'O(U)-U'.$C$1:$'O(U)-U'.$C$1048576];[.$R7];[$'O(U)-U'.$D$1:$'O(U)-U'.$D$1048576];[.$S7];[$'O(U)-U'.$E$1:$'O(U)-U'.$E$1048576];[.$T7])" office:value-type="float" office:value="0" calcext:value-type="float">
            <text:p>0</text:p>
          </table:table-cell>
          <table:table-cell table:style-name="ce69" table:formula="of:=[.AC7]=[.AD7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Err1</text:p>
          </table:table-cell>
          <table:table-cell office:value-type="string" calcext:value-type="string">
            <text:p>Err124</text:p>
          </table:table-cell>
          <table:table-cell office:value-type="string" calcext:value-type="string">
            <text:p>SubCircuitInconclusive</text:p>
          </table:table-cell>
          <table:table-cell office:value-type="string" calcext:value-type="string">
            <text:p>Entanglement1</text:p>
          </table:table-cell>
        </table:table-row>
        <table:table-row table:style-name="ro1">
          <table:table-cell table:style-name="ce43" office:value-type="string" calcext:value-type="string">
            <text:p>AutoQ</text:p>
          </table:table-cell>
          <table:table-cell office:value-type="string" calcext:value-type="string">
            <text:p>POPL25</text:p>
          </table:table-cell>
          <table:table-cell office:value-type="string" calcext:value-type="string">
            <text:p>standalone</text:p>
          </table:table-cell>
          <table:table-cell table:style-name="Default" office:value-type="string" calcext:value-type="string">
            <text:p>None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&quot;NS&quot;)+COUNTIFS([$'sanity-unit'.$C$1:$'sanity-unit'.$C$1048576];[.$A8];[$'sanity-unit'.$D$1:$'sanity-unit'.$D$1048576];[.$B8];[$'sanity-unit'.$E$1:$'sanity-unit'.$E$1048576];[.$C8];[$'sanity-unit'.$F$1:$'sanity-unit'.$F$1048576];[.$D8];[$'sanity-unit'.$N$1:$'sanity-unit'.$N$1048576];&quot;NS1&quot;)+COUNTIFS([$'sanity-unit'.$C$1:$'sanity-unit'.$C$1048576];[.$A8];[$'sanity-unit'.$D$1:$'sanity-unit'.$D$1048576];[.$B8];[$'sanity-unit'.$E$1:$'sanity-unit'.$E$1048576];[.$C8];[$'sanity-unit'.$F$1:$'sanity-unit'.$F$1048576];[.$D8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8];[$'sanity-unit'.$D$1:$'sanity-unit'.$D$1048576];[.$B8];[$'sanity-unit'.$E$1:$'sanity-unit'.$E$1048576];[.$C8];[$'sanity-unit'.$F$1:$'sanity-unit'.$F$1048576];[.$D8])" office:value-type="float" office:value="0" calcext:value-type="float">
            <text:p>0,00</text:p>
          </table:table-cell>
          <table:table-cell table:style-name="Default" table:formula="of:=[.K8]/[.H8]" office:value-type="string" office:string-value="" calcext:value-type="error">
            <text:p>#DIV/0!</text:p>
          </table:table-cell>
          <table:table-cell table:formula="of:=SUM([.E8:.J8])" office:value-type="float" office:value="0" calcext:value-type="float">
            <text:p>0</text:p>
          </table:table-cell>
          <table:table-cell table:formula="of:=COUNTIFS([$'sanity-unit'.$C$1:$'sanity-unit'.$C$1048576];[.$A8];[$'sanity-unit'.$D$1:$'sanity-unit'.$D$1048576];[.$B8];[$'sanity-unit'.$E$1:$'sanity-unit'.$E$1048576];[.$C8];[$'sanity-unit'.$F$1:$'sanity-unit'.$F$1048576];[.$D8] )" office:value-type="float" office:value="0" calcext:value-type="float">
            <text:p>0</text:p>
          </table:table-cell>
          <table:table-cell table:style-name="ce69" table:formula="of:=[.M8]=[.N8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O(U)-U'.$B$1:$'O(U)-U'.$B$1048576];[.$Q8];[$'O(U)-U'.$C$1:$'O(U)-U'.$C$1048576];[.$R8];[$'O(U)-U'.$D$1:$'O(U)-U'.$D$1048576];[.$S8];[$'O(U)-U'.$E$1:$'O(U)-U'.$E$1048576];[.$T8];[$'O(U)-U'.$M$1:$'O(U)-U'.$M$1048576];&quot;&gt;=0&quot;)" office:value-type="float" office:value="0" calcext:value-type="float">
            <text:p>0</text:p>
          </table:table-cell>
          <table:table-cell table:style-name="ce52" table:formula="of:=COUNTIFS([$'O(U)-U'.$B$1:$'O(U)-U'.$B$1048576];[.$Q8];[$'O(U)-U'.$C$1:$'O(U)-U'.$C$1048576];[.$R8];[$'O(U)-U'.$D$1:$'O(U)-U'.$D$1048576];[.$S8];[$'O(U)-U'.$E$1:$'O(U)-U'.$E$1048576];[.$T8];[$'O(U)-U'.$M$1:$'O(U)-U'.$M$1048576];[.V$6])" office:value-type="float" office:value="0" calcext:value-type="float">
            <text:p>0</text:p>
          </table:table-cell>
          <table:table-cell table:formula="of:=COUNTIFS([$'O(U)-U'.$B$1:$'O(U)-U'.$B$1048576];[.$Q8];[$'O(U)-U'.$C$1:$'O(U)-U'.$C$1048576];[.$R8];[$'O(U)-U'.$D$1:$'O(U)-U'.$D$1048576];[.$S8];[$'O(U)-U'.$E$1:$'O(U)-U'.$E$1048576];[.$T8];[$'O(U)-U'.$M$1:$'O(U)-U'.$M$1048576];[.W$6])" office:value-type="float" office:value="0" calcext:value-type="float">
            <text:p>0</text:p>
          </table:table-cell>
          <table:table-cell table:formula="of:=COUNTIFS([$'O(U)-U'.$B$1:$'O(U)-U'.$B$1048576];[.$Q8];[$'O(U)-U'.$C$1:$'O(U)-U'.$C$1048576];[.$R8];[$'O(U)-U'.$D$1:$'O(U)-U'.$D$1048576];[.$S8];[$'O(U)-U'.$E$1:$'O(U)-U'.$E$1048576];[.$T8];[$'O(U)-U'.$M$1:$'O(U)-U'.$M$1048576];&quot;NS&quot;)+COUNTIFS([$'O(U)-U'.$B$1:$'O(U)-U'.$B$1048576];[.$Q8];[$'O(U)-U'.$C$1:$'O(U)-U'.$C$1048576];[.$R8];[$'O(U)-U'.$D$1:$'O(U)-U'.$D$1048576];[.$S8];[$'O(U)-U'.$E$1:$'O(U)-U'.$E$1048576];[.$T8];[$'O(U)-U'.$M$1:$'O(U)-U'.$M$1048576];&quot;NS1&quot;)+COUNTIFS([$'O(U)-U'.$B$1:$'O(U)-U'.$B$1048576];[.$Q8];[$'O(U)-U'.$C$1:$'O(U)-U'.$C$1048576];[.$R8];[$'O(U)-U'.$D$1:$'O(U)-U'.$D$1048576];[.$S8];[$'O(U)-U'.$E$1:$'O(U)-U'.$E$1048576];[.$T8];[$'O(U)-U'.$M$1:$'O(U)-U'.$M$1048576];&quot;NS2&quot;)" office:value-type="float" office:value="0" calcext:value-type="float">
            <text:p>0</text:p>
          </table:table-cell>
          <table:table-cell table:formula="of:=COUNTIFS([$'O(U)-U'.$B$1:$'O(U)-U'.$B$1048576];[.$Q8];[$'O(U)-U'.$C$1:$'O(U)-U'.$C$1048576];[.$R8];[$'O(U)-U'.$D$1:$'O(U)-U'.$D$1048576];[.$S8];[$'O(U)-U'.$E$1:$'O(U)-U'.$E$1048576];[.$T8];[$'O(U)-U'.$M$1:$'O(U)-U'.$M$1048576];[.Y$6])" office:value-type="float" office:value="0" calcext:value-type="float">
            <text:p>0</text:p>
          </table:table-cell>
          <table:table-cell table:formula="of:=COUNTIFS([$'O(U)-U'.$B$1:$'O(U)-U'.$B$1048576];[.$Q8];[$'O(U)-U'.$C$1:$'O(U)-U'.$C$1048576];[.$R8];[$'O(U)-U'.$D$1:$'O(U)-U'.$D$1048576];[.$S8];[$'O(U)-U'.$E$1:$'O(U)-U'.$E$1048576];[.$T8];[$'O(U)-U'.$M$1:$'O(U)-U'.$M$1048576];[.Z$6])" office:value-type="float" office:value="0" calcext:value-type="float">
            <text:p>0</text:p>
          </table:table-cell>
          <table:table-cell table:formula="of:=SUMIFS([$'O(U)-U'.$M$1:$'O(U)-U'.$M$1048576];[$'O(U)-U'.$B$1:$'O(U)-U'.$B$1048576];[.$Q8];[$'O(U)-U'.$C$1:$'O(U)-U'.$C$1048576];[.$R8];[$'O(U)-U'.$D$1:$'O(U)-U'.$D$1048576];[.$S8];[$'O(U)-U'.$E$1:$'O(U)-U'.$E$1048576];[.$T8])" office:value-type="float" office:value="0" calcext:value-type="float">
            <text:p>0</text:p>
          </table:table-cell>
          <table:table-cell table:formula="of:=[.AA8]/[.U8]" office:value-type="string" office:string-value="" calcext:value-type="error">
            <text:p>#DIV/0!</text:p>
          </table:table-cell>
          <table:table-cell table:formula="of:=SUM([.U8:.Z8])" office:value-type="float" office:value="0" calcext:value-type="float">
            <text:p>0</text:p>
          </table:table-cell>
          <table:table-cell table:formula="of:=COUNTIFS([$'O(U)-U'.$B$1:$'O(U)-U'.$B$1048576];[.$Q8];[$'O(U)-U'.$C$1:$'O(U)-U'.$C$1048576];[.$R8];[$'O(U)-U'.$D$1:$'O(U)-U'.$D$1048576];[.$S8];[$'O(U)-U'.$E$1:$'O(U)-U'.$E$1048576];[.$T8])" office:value-type="float" office:value="0" calcext:value-type="float">
            <text:p>0</text:p>
          </table:table-cell>
          <table:table-cell table:style-name="ce69" table:formula="of:=[.AC8]=[.AD8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Err127</text:p>
          </table:table-cell>
          <table:table-cell office:value-type="string" calcext:value-type="string">
            <text:p>Err137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&quot;NS&quot;)+COUNTIFS([$'sanity-unit'.$C$1:$'sanity-unit'.$C$1048576];[.$A9];[$'sanity-unit'.$D$1:$'sanity-unit'.$D$1048576];[.$B9];[$'sanity-unit'.$E$1:$'sanity-unit'.$E$1048576];[.$C9];[$'sanity-unit'.$F$1:$'sanity-unit'.$F$1048576];[.$D9];[$'sanity-unit'.$N$1:$'sanity-unit'.$N$1048576];&quot;NS1&quot;)+COUNTIFS([$'sanity-unit'.$C$1:$'sanity-unit'.$C$1048576];[.$A9];[$'sanity-unit'.$D$1:$'sanity-unit'.$D$1048576];[.$B9];[$'sanity-unit'.$E$1:$'sanity-unit'.$E$1048576];[.$C9];[$'sanity-unit'.$F$1:$'sanity-unit'.$F$1048576];[.$D9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9];[$'sanity-unit'.$D$1:$'sanity-unit'.$D$1048576];[.$B9];[$'sanity-unit'.$E$1:$'sanity-unit'.$E$1048576];[.$C9];[$'sanity-unit'.$F$1:$'sanity-unit'.$F$1048576];[.$D9])" office:value-type="float" office:value="0" calcext:value-type="float">
            <text:p>0,00</text:p>
          </table:table-cell>
          <table:table-cell table:style-name="Default" table:formula="of:=[.K9]/[.H9]" office:value-type="string" office:string-value="" calcext:value-type="error">
            <text:p>#DIV/0!</text:p>
          </table:table-cell>
          <table:table-cell table:formula="of:=SUM([.E9:.J9])" office:value-type="float" office:value="0" calcext:value-type="float">
            <text:p>0</text:p>
          </table:table-cell>
          <table:table-cell table:formula="of:=COUNTIFS([$'sanity-unit'.$C$1:$'sanity-unit'.$C$1048576];[.$A9];[$'sanity-unit'.$D$1:$'sanity-unit'.$D$1048576];[.$B9];[$'sanity-unit'.$E$1:$'sanity-unit'.$E$1048576];[.$C9];[$'sanity-unit'.$F$1:$'sanity-unit'.$F$1048576];[.$D9] )" office:value-type="float" office:value="0" calcext:value-type="float">
            <text:p>0</text:p>
          </table:table-cell>
          <table:table-cell table:style-name="ce69" table:formula="of:=[.M9]=[.N9]" office:value-type="boolean" office:boolean-value="true" calcext:value-type="boolean">
            <text:p>VRAI</text:p>
          </table:table-cell>
          <table:table-cell table:number-columns-repeated="17"/>
          <table:table-cell office:value-type="string" calcext:value-type="string">
            <text:p>Err134</text:p>
          </table:table-cell>
          <table:table-cell office:value-type="string" calcext:value-type="string">
            <text:p>nothing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&quot;NS&quot;)+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&quot;NS1&quot;)+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10];[$'sanity-unit'.$D$1:$'sanity-unit'.$D$1048576];[.$B10];[$'sanity-unit'.$E$1:$'sanity-unit'.$E$1048576];[.$C10];[$'sanity-unit'.$F$1:$'sanity-unit'.$F$1048576];[.$D10])" office:value-type="float" office:value="0" calcext:value-type="float">
            <text:p>0,00</text:p>
          </table:table-cell>
          <table:table-cell table:style-name="Default" table:formula="of:=[.K10]/[.H10]" office:value-type="string" office:string-value="" calcext:value-type="error">
            <text:p>#DIV/0!</text:p>
          </table:table-cell>
          <table:table-cell table:formula="of:=SUM([.E10:.J10])" office:value-type="float" office:value="0" calcext:value-type="float">
            <text:p>0</text:p>
          </table:table-cell>
          <table:table-cell table:formula="of:=COUNTIFS([$'sanity-unit'.$C$1:$'sanity-unit'.$C$1048576];[.$A10];[$'sanity-unit'.$D$1:$'sanity-unit'.$D$1048576];[.$B10];[$'sanity-unit'.$E$1:$'sanity-unit'.$E$1048576];[.$C10];[$'sanity-unit'.$F$1:$'sanity-unit'.$F$1048576];[.$D10] )" office:value-type="float" office:value="0" calcext:value-type="float">
            <text:p>0</text:p>
          </table:table-cell>
          <table:table-cell table:style-name="ce69" table:formula="of:=[.M10]=[.N10]" office:value-type="boolean" office:boolean-value="true" calcext:value-type="boolean">
            <text:p>VRAI</text:p>
          </table:table-cell>
          <table:table-cell table:number-columns-repeated="17"/>
          <table:table-cell office:value-type="string" calcext:value-type="string">
            <text:p>Err139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&quot;NS&quot;)+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&quot;NS1&quot;)+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11];[$'sanity-unit'.$D$1:$'sanity-unit'.$D$1048576];[.$B11];[$'sanity-unit'.$E$1:$'sanity-unit'.$E$1048576];[.$C11];[$'sanity-unit'.$F$1:$'sanity-unit'.$F$1048576];[.$D11])" office:value-type="float" office:value="0" calcext:value-type="float">
            <text:p>0,00</text:p>
          </table:table-cell>
          <table:table-cell table:style-name="Default" table:formula="of:=[.K11]/[.H11]" office:value-type="string" office:string-value="" calcext:value-type="error">
            <text:p>#DIV/0!</text:p>
          </table:table-cell>
          <table:table-cell table:formula="of:=SUM([.E11:.J11])" office:value-type="float" office:value="0" calcext:value-type="float">
            <text:p>0</text:p>
          </table:table-cell>
          <table:table-cell table:formula="of:=COUNTIFS([$'sanity-unit'.$C$1:$'sanity-unit'.$C$1048576];[.$A11];[$'sanity-unit'.$D$1:$'sanity-unit'.$D$1048576];[.$B11];[$'sanity-unit'.$E$1:$'sanity-unit'.$E$1048576];[.$C11];[$'sanity-unit'.$F$1:$'sanity-unit'.$F$1048576];[.$D11] )" office:value-type="float" office:value="0" calcext:value-type="float">
            <text:p>0</text:p>
          </table:table-cell>
          <table:table-cell table:style-name="ce69" table:formula="of:=[.M11]=[.N11]" office:value-type="boolean" office:boolean-value="true" calcext:value-type="boolean">
            <text:p>VRAI</text:p>
          </table:table-cell>
          <table:table-cell/>
          <table:table-cell table:style-name="ce3" office:value-type="string" calcext:value-type="string" table:number-columns-spanned="15" table:number-rows-spanned="3">
            <text:p>T(U)-U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4"/>
          <table:table-cell/>
          <table:table-cell office:value-type="string" calcext:value-type="string">
            <text:p>Err143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DM,NoPartial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&quot;NS&quot;)+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&quot;NS1&quot;)+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12];[$'sanity-unit'.$D$1:$'sanity-unit'.$D$1048576];[.$B12];[$'sanity-unit'.$E$1:$'sanity-unit'.$E$1048576];[.$C12];[$'sanity-unit'.$F$1:$'sanity-unit'.$F$1048576];[.$D12])" office:value-type="float" office:value="0" calcext:value-type="float">
            <text:p>0,00</text:p>
          </table:table-cell>
          <table:table-cell table:style-name="Default" table:formula="of:=[.K12]/[.H12]" office:value-type="string" office:string-value="" calcext:value-type="error">
            <text:p>#DIV/0!</text:p>
          </table:table-cell>
          <table:table-cell table:formula="of:=SUM([.E12:.J12])" office:value-type="float" office:value="0" calcext:value-type="float">
            <text:p>0</text:p>
          </table:table-cell>
          <table:table-cell table:formula="of:=COUNTIFS([$'sanity-unit'.$C$1:$'sanity-unit'.$C$1048576];[.$A12];[$'sanity-unit'.$D$1:$'sanity-unit'.$D$1048576];[.$B12];[$'sanity-unit'.$E$1:$'sanity-unit'.$E$1048576];[.$C12];[$'sanity-unit'.$F$1:$'sanity-unit'.$F$1048576];[.$D12] )" office:value-type="float" office:value="0" calcext:value-type="float">
            <text:p>0</text:p>
          </table:table-cell>
          <table:table-cell table:style-name="ce69" table:formula="of:=[.M12]=[.N12]" office:value-type="boolean" office:boolean-value="true" calcext:value-type="boolean">
            <text:p>VRAI</text:p>
          </table:table-cell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/>
          <table:table-cell office:value-type="string" calcext:value-type="string">
            <text:p>Err251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SQbrick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standalone</text:p>
          </table:table-cell>
          <table:table-cell table:style-name="ce53" office:value-type="string" calcext:value-type="string">
            <text:p>Sequence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&quot;NS&quot;)+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&quot;NS1&quot;)+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13];[$'sanity-unit'.$D$1:$'sanity-unit'.$D$1048576];[.$B13];[$'sanity-unit'.$E$1:$'sanity-unit'.$E$1048576];[.$C13];[$'sanity-unit'.$F$1:$'sanity-unit'.$F$1048576];[.$D13])" office:value-type="float" office:value="0" calcext:value-type="float">
            <text:p>0,00</text:p>
          </table:table-cell>
          <table:table-cell table:style-name="Default" table:formula="of:=[.K13]/[.H13]" office:value-type="string" office:string-value="" calcext:value-type="error">
            <text:p>#DIV/0!</text:p>
          </table:table-cell>
          <table:table-cell table:formula="of:=SUM([.E13:.J13])" office:value-type="float" office:value="0" calcext:value-type="float">
            <text:p>0</text:p>
          </table:table-cell>
          <table:table-cell table:formula="of:=COUNTIFS([$'sanity-unit'.$C$1:$'sanity-unit'.$C$1048576];[.$A13];[$'sanity-unit'.$D$1:$'sanity-unit'.$D$1048576];[.$B13];[$'sanity-unit'.$E$1:$'sanity-unit'.$E$1048576];[.$C13];[$'sanity-unit'.$F$1:$'sanity-unit'.$F$1048576];[.$D13] )" office:value-type="float" office:value="0" calcext:value-type="float">
            <text:p>0</text:p>
          </table:table-cell>
          <table:table-cell table:style-name="ce69" table:formula="of:=[.M13]=[.N13]" office:value-type="boolean" office:boolean-value="true" calcext:value-type="boolean">
            <text:p>VRAI</text:p>
          </table:table-cell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/>
          <table:table-cell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office:value-type="string" calcext:value-type="string">
            <text:p>standalone</text:p>
          </table:table-cell>
          <table:table-cell table:style-name="ce54" office:value-type="string" calcext:value-type="string">
            <text:p>Parallel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[.E$6])" office:value-type="float" office:value="0" calcext:value-type="float">
            <text:p>0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[.F$6])" office:value-type="float" office:value="0" calcext:value-type="float">
            <text:p>0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&quot;NS&quot;)+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&quot;NS1&quot;)+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&quot;NS2&quot;)" office:value-type="float" office:value="0" calcext:value-type="float">
            <text:p>0</text:p>
          </table:table-cell>
          <table:table-cell table:style-name="ce26"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&quot;&gt;=0&quot;)" office:value-type="float" office:value="0" calcext:value-type="float">
            <text:p>0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[.I$6])" office:value-type="float" office:value="0" calcext:value-type="float">
            <text:p>0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;[$'sanity-unit'.$N$1:$'sanity-unit'.$N$1048576];[.J$6])" office:value-type="float" office:value="0" calcext:value-type="float">
            <text:p>0</text:p>
          </table:table-cell>
          <table:table-cell table:formula="of:=SUMIFS([$'sanity-unit'.$N$1:$'sanity-unit'.$N$1048576];[$'sanity-unit'.$C$1:$'sanity-unit'.$C$1048576];[.$A14];[$'sanity-unit'.$D$1:$'sanity-unit'.$D$1048576];[.$B14];[$'sanity-unit'.$E$1:$'sanity-unit'.$E$1048576];[.$C14];[$'sanity-unit'.$F$1:$'sanity-unit'.$F$1048576];[.$D14])" office:value-type="float" office:value="0" calcext:value-type="float">
            <text:p>0,00</text:p>
          </table:table-cell>
          <table:table-cell table:style-name="Default" table:formula="of:=[.K14]/[.H14]" office:value-type="string" office:string-value="" calcext:value-type="error">
            <text:p>#DIV/0!</text:p>
          </table:table-cell>
          <table:table-cell table:formula="of:=SUM([.E14:.J14])" office:value-type="float" office:value="0" calcext:value-type="float">
            <text:p>0</text:p>
          </table:table-cell>
          <table:table-cell table:formula="of:=COUNTIFS([$'sanity-unit'.$C$1:$'sanity-unit'.$C$1048576];[.$A14];[$'sanity-unit'.$D$1:$'sanity-unit'.$D$1048576];[.$B14];[$'sanity-unit'.$E$1:$'sanity-unit'.$E$1048576];[.$C14];[$'sanity-unit'.$F$1:$'sanity-unit'.$F$1048576];[.$D14] )" office:value-type="float" office:value="0" calcext:value-type="float">
            <text:p>0</text:p>
          </table:table-cell>
          <table:table-cell table:style-name="ce69" table:formula="of:=[.M14]=[.N14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5" office:value-type="string" calcext:value-type="string">
            <text:p>Greet</text:p>
          </table:table-cell>
          <table:table-cell table:style-name="ce8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/>
          <table:table-cell office:value-type="string" calcext:value-type="string">
            <text:p>Err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5" table:number-columns-repeated="6"/>
          <table:table-cell table:style-name="ce62" table:number-columns-repeated="2"/>
          <table:table-cell table:number-columns-repeated="4"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formula="of:=COUNTIFS([$'T(U)-U'.$B$1:$'T(U)-U'.$B$1048576];[.$Q15];[$'T(U)-U'.$C$1:$'T(U)-U'.$C$1048576];[.$R15];[$'T(U)-U'.$D$1:$'T(U)-U'.$D$1048576];[.$S15];[$'T(U)-U'.$E$1:$'T(U)-U'.$E$1048576];[.$T15];[$'T(U)-U'.$M$1:$'T(U)-U'.$M$1048576];&quot;&gt;=0&quot;)" office:value-type="float" office:value="0" calcext:value-type="float">
            <text:p>0</text:p>
          </table:table-cell>
          <table:table-cell table:style-name="ce52" table:formula="of:=COUNTIFS([$'T(U)-U'.$B$1:$'T(U)-U'.$B$1048576];[.$Q15];[$'T(U)-U'.$C$1:$'T(U)-U'.$C$1048576];[.$R15];[$'T(U)-U'.$D$1:$'T(U)-U'.$D$1048576];[.$S15];[$'T(U)-U'.$E$1:$'T(U)-U'.$E$1048576];[.$T15];[$'T(U)-U'.$M$1:$'T(U)-U'.$M$1048576];[.V$6])" office:value-type="float" office:value="0" calcext:value-type="float">
            <text:p>0</text:p>
          </table:table-cell>
          <table:table-cell table:formula="of:=COUNTIFS([$'T(U)-U'.$B$1:$'T(U)-U'.$B$1048576];[.$Q15];[$'T(U)-U'.$C$1:$'T(U)-U'.$C$1048576];[.$R15];[$'T(U)-U'.$D$1:$'T(U)-U'.$D$1048576];[.$S15];[$'T(U)-U'.$E$1:$'T(U)-U'.$E$1048576];[.$T15];[$'T(U)-U'.$M$1:$'T(U)-U'.$M$1048576];[.W$6])" office:value-type="float" office:value="0" calcext:value-type="float">
            <text:p>0</text:p>
          </table:table-cell>
          <table:table-cell table:formula="of:=COUNTIFS([$'T(U)-U'.$B$1:$'T(U)-U'.$B$1048576];[.$Q15];[$'T(U)-U'.$C$1:$'T(U)-U'.$C$1048576];[.$R15];[$'T(U)-U'.$D$1:$'T(U)-U'.$D$1048576];[.$S15];[$'T(U)-U'.$E$1:$'T(U)-U'.$E$1048576];[.$T15];[$'T(U)-U'.$M$1:$'T(U)-U'.$M$1048576];&quot;NS&quot;)+COUNTIFS([$'T(U)-U'.$B$1:$'T(U)-U'.$B$1048576];[.$Q15];[$'T(U)-U'.$C$1:$'T(U)-U'.$C$1048576];[.$R15];[$'T(U)-U'.$D$1:$'T(U)-U'.$D$1048576];[.$S15];[$'T(U)-U'.$E$1:$'T(U)-U'.$E$1048576];[.$T15];[$'T(U)-U'.$M$1:$'T(U)-U'.$M$1048576];&quot;NS1&quot;)+COUNTIFS([$'T(U)-U'.$B$1:$'T(U)-U'.$B$1048576];[.$Q15];[$'T(U)-U'.$C$1:$'T(U)-U'.$C$1048576];[.$R15];[$'T(U)-U'.$D$1:$'T(U)-U'.$D$1048576];[.$S15];[$'T(U)-U'.$E$1:$'T(U)-U'.$E$1048576];[.$T15];[$'T(U)-U'.$M$1:$'T(U)-U'.$M$1048576];&quot;NS2&quot;)" office:value-type="float" office:value="0" calcext:value-type="float">
            <text:p>0</text:p>
          </table:table-cell>
          <table:table-cell table:formula="of:=COUNTIFS([$'T(U)-U'.$B$1:$'T(U)-U'.$B$1048576];[.$Q15];[$'T(U)-U'.$C$1:$'T(U)-U'.$C$1048576];[.$R15];[$'T(U)-U'.$D$1:$'T(U)-U'.$D$1048576];[.$S15];[$'T(U)-U'.$E$1:$'T(U)-U'.$E$1048576];[.$T15];[$'T(U)-U'.$M$1:$'T(U)-U'.$M$1048576];[.Y$6])" office:value-type="float" office:value="0" calcext:value-type="float">
            <text:p>0</text:p>
          </table:table-cell>
          <table:table-cell table:formula="of:=COUNTIFS([$'T(U)-U'.$B$1:$'T(U)-U'.$B$1048576];[.$Q15];[$'T(U)-U'.$C$1:$'T(U)-U'.$C$1048576];[.$R15];[$'T(U)-U'.$D$1:$'T(U)-U'.$D$1048576];[.$S15];[$'T(U)-U'.$E$1:$'T(U)-U'.$E$1048576];[.$T15];[$'T(U)-U'.$M$1:$'T(U)-U'.$M$1048576];[.Z$6])" office:value-type="float" office:value="0" calcext:value-type="float">
            <text:p>0</text:p>
          </table:table-cell>
          <table:table-cell table:formula="of:=SUMIFS([$'T(U)-U'.$M$1:$'T(U)-U'.$M$1048576];[$'T(U)-U'.$B$1:$'T(U)-U'.$B$1048576];[.$Q15];[$'T(U)-U'.$C$1:$'T(U)-U'.$C$1048576];[.$R15];[$'T(U)-U'.$D$1:$'T(U)-U'.$D$1048576];[.$S15];[$'T(U)-U'.$E$1:$'T(U)-U'.$E$1048576];[.$T15])" office:value-type="float" office:value="0" calcext:value-type="float">
            <text:p>0</text:p>
          </table:table-cell>
          <table:table-cell table:formula="of:=[.AA15]/[.U15]" office:value-type="string" office:string-value="" calcext:value-type="error">
            <text:p>#DIV/0!</text:p>
          </table:table-cell>
          <table:table-cell table:formula="of:=SUM([.U15:.Z15])" office:value-type="float" office:value="0" calcext:value-type="float">
            <text:p>0</text:p>
          </table:table-cell>
          <table:table-cell table:formula="of:=COUNTIFS([$'T(U)-U'.$B$1:$'T(U)-U'.$B$1048576];[.$Q15];[$'T(U)-U'.$C$1:$'T(U)-U'.$C$1048576];[.$R15];[$'T(U)-U'.$D$1:$'T(U)-U'.$D$1048576];[.$S15];[$'T(U)-U'.$E$1:$'T(U)-U'.$E$1048576];[.$T15])" office:value-type="float" office:value="0" calcext:value-type="float">
            <text:p>0</text:p>
          </table:table-cell>
          <table:table-cell table:style-name="ce69" table:formula="of:=[.AC15]=[.AD15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5" table:number-rows-spanned="3">
            <text:p>Sanity Hybrid - Total : 21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10"/>
          <table:covered-table-cell table:style-name="ce80"/>
          <table:table-cell table:style-name="ce71" table:number-columns-spanned="1" table:number-rows-spanned="3"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T(U)-U'.$B$1:$'T(U)-U'.$B$1048576];[.$Q16];[$'T(U)-U'.$C$1:$'T(U)-U'.$C$1048576];[.$R16];[$'T(U)-U'.$D$1:$'T(U)-U'.$D$1048576];[.$S16];[$'T(U)-U'.$E$1:$'T(U)-U'.$E$1048576];[.$T16];[$'T(U)-U'.$M$1:$'T(U)-U'.$M$1048576];&quot;&gt;=0&quot;)" office:value-type="float" office:value="0" calcext:value-type="float">
            <text:p>0</text:p>
          </table:table-cell>
          <table:table-cell table:style-name="ce52" table:formula="of:=COUNTIFS([$'T(U)-U'.$B$1:$'T(U)-U'.$B$1048576];[.$Q16];[$'T(U)-U'.$C$1:$'T(U)-U'.$C$1048576];[.$R16];[$'T(U)-U'.$D$1:$'T(U)-U'.$D$1048576];[.$S16];[$'T(U)-U'.$E$1:$'T(U)-U'.$E$1048576];[.$T16];[$'T(U)-U'.$M$1:$'T(U)-U'.$M$1048576];[.V$6])" office:value-type="float" office:value="0" calcext:value-type="float">
            <text:p>0</text:p>
          </table:table-cell>
          <table:table-cell table:formula="of:=COUNTIFS([$'T(U)-U'.$B$1:$'T(U)-U'.$B$1048576];[.$Q16];[$'T(U)-U'.$C$1:$'T(U)-U'.$C$1048576];[.$R16];[$'T(U)-U'.$D$1:$'T(U)-U'.$D$1048576];[.$S16];[$'T(U)-U'.$E$1:$'T(U)-U'.$E$1048576];[.$T16];[$'T(U)-U'.$M$1:$'T(U)-U'.$M$1048576];[.W$6])" office:value-type="float" office:value="0" calcext:value-type="float">
            <text:p>0</text:p>
          </table:table-cell>
          <table:table-cell table:formula="of:=COUNTIFS([$'T(U)-U'.$B$1:$'T(U)-U'.$B$1048576];[.$Q16];[$'T(U)-U'.$C$1:$'T(U)-U'.$C$1048576];[.$R16];[$'T(U)-U'.$D$1:$'T(U)-U'.$D$1048576];[.$S16];[$'T(U)-U'.$E$1:$'T(U)-U'.$E$1048576];[.$T16];[$'T(U)-U'.$M$1:$'T(U)-U'.$M$1048576];&quot;NS&quot;)+COUNTIFS([$'T(U)-U'.$B$1:$'T(U)-U'.$B$1048576];[.$Q16];[$'T(U)-U'.$C$1:$'T(U)-U'.$C$1048576];[.$R16];[$'T(U)-U'.$D$1:$'T(U)-U'.$D$1048576];[.$S16];[$'T(U)-U'.$E$1:$'T(U)-U'.$E$1048576];[.$T16];[$'T(U)-U'.$M$1:$'T(U)-U'.$M$1048576];&quot;NS1&quot;)+COUNTIFS([$'T(U)-U'.$B$1:$'T(U)-U'.$B$1048576];[.$Q16];[$'T(U)-U'.$C$1:$'T(U)-U'.$C$1048576];[.$R16];[$'T(U)-U'.$D$1:$'T(U)-U'.$D$1048576];[.$S16];[$'T(U)-U'.$E$1:$'T(U)-U'.$E$1048576];[.$T16];[$'T(U)-U'.$M$1:$'T(U)-U'.$M$1048576];&quot;NS2&quot;)" office:value-type="float" office:value="0" calcext:value-type="float">
            <text:p>0</text:p>
          </table:table-cell>
          <table:table-cell table:formula="of:=COUNTIFS([$'T(U)-U'.$B$1:$'T(U)-U'.$B$1048576];[.$Q16];[$'T(U)-U'.$C$1:$'T(U)-U'.$C$1048576];[.$R16];[$'T(U)-U'.$D$1:$'T(U)-U'.$D$1048576];[.$S16];[$'T(U)-U'.$E$1:$'T(U)-U'.$E$1048576];[.$T16];[$'T(U)-U'.$M$1:$'T(U)-U'.$M$1048576];[.Y$6])" office:value-type="float" office:value="0" calcext:value-type="float">
            <text:p>0</text:p>
          </table:table-cell>
          <table:table-cell table:formula="of:=COUNTIFS([$'T(U)-U'.$B$1:$'T(U)-U'.$B$1048576];[.$Q16];[$'T(U)-U'.$C$1:$'T(U)-U'.$C$1048576];[.$R16];[$'T(U)-U'.$D$1:$'T(U)-U'.$D$1048576];[.$S16];[$'T(U)-U'.$E$1:$'T(U)-U'.$E$1048576];[.$T16];[$'T(U)-U'.$M$1:$'T(U)-U'.$M$1048576];[.Z$6])" office:value-type="float" office:value="0" calcext:value-type="float">
            <text:p>0</text:p>
          </table:table-cell>
          <table:table-cell table:formula="of:=SUMIFS([$'T(U)-U'.$M$1:$'T(U)-U'.$M$1048576];[$'T(U)-U'.$B$1:$'T(U)-U'.$B$1048576];[.$Q16];[$'T(U)-U'.$C$1:$'T(U)-U'.$C$1048576];[.$R16];[$'T(U)-U'.$D$1:$'T(U)-U'.$D$1048576];[.$S16];[$'T(U)-U'.$E$1:$'T(U)-U'.$E$1048576];[.$T16])" office:value-type="float" office:value="0" calcext:value-type="float">
            <text:p>0</text:p>
          </table:table-cell>
          <table:table-cell table:formula="of:=[.AA16]/[.U16]" office:value-type="string" office:string-value="" calcext:value-type="error">
            <text:p>#DIV/0!</text:p>
          </table:table-cell>
          <table:table-cell table:formula="of:=SUM([.U16:.Z16])" office:value-type="float" office:value="0" calcext:value-type="float">
            <text:p>0</text:p>
          </table:table-cell>
          <table:table-cell table:formula="of:=COUNTIFS([$'T(U)-U'.$B$1:$'T(U)-U'.$B$1048576];[.$Q16];[$'T(U)-U'.$C$1:$'T(U)-U'.$C$1048576];[.$R16];[$'T(U)-U'.$D$1:$'T(U)-U'.$D$1048576];[.$S16];[$'T(U)-U'.$E$1:$'T(U)-U'.$E$1048576];[.$T16])" office:value-type="float" office:value="0" calcext:value-type="float">
            <text:p>0</text:p>
          </table:table-cell>
          <table:table-cell table:style-name="ce69" table:formula="of:=[.AC16]=[.AD16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covered-table-cell/>
          <table:table-cell table:number-columns-repeated="20"/>
        </table:table-row>
        <table:table-row table:style-name="ro1"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covered-table-cell/>
          <table:table-cell table:number-columns-repeated="20"/>
        </table:table-row>
        <table:table-row table:style-name="ro1">
          <table:table-cell table:style-name="ce43" office:value-type="string" calcext:value-type="string">
            <text:p>Tool</text:p>
          </table:table-cell>
          <table:table-cell table:style-name="ce48" office:value-type="string" calcext:value-type="string">
            <text:p>Version</text:p>
          </table:table-cell>
          <table:table-cell table:style-name="ce43" office:value-type="string" calcext:value-type="string">
            <text:p>Lift</text:p>
          </table:table-cell>
          <table:table-cell table:style-name="ce43" office:value-type="string" calcext:value-type="string">
            <text:p>Opt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25" office:value-type="string" calcext:value-type="string">
            <text:p>Err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61" office:value-type="string" calcext:value-type="string">
            <text:p>TT</text:p>
          </table:table-cell>
          <table:table-cell table:style-name="ce64" office:value-type="string" calcext:value-type="string">
            <text:p>AT</text:p>
          </table:table-cell>
          <table:table-cell table:style-name="ce65" office:value-type="string" calcext:value-type="string">
            <text:p>Greet</text:p>
          </table:table-cell>
          <table:table-cell table:style-name="ce6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/>
          <table:table-cell table:style-name="ce3" office:value-type="string" calcext:value-type="string" table:number-columns-spanned="15" table:number-rows-spanned="3">
            <text:p>U-DC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3"/>
          <table:covered-table-cell table:style-name="ce80"/>
          <table:table-cell table:number-columns-repeated="5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&quot;NS&quot;)+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&quot;NS1&quot;)+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0];[$'sanity-hybrid'.$D$1:$'sanity-hybrid'.$D$1048576];[.$B20];[$'sanity-hybrid'.$E$1:$'sanity-hybrid'.$E$1048576];[.$C20];[$'sanity-hybrid'.$F$1:$'sanity-hybrid'.$F$1048576];[.$D20])" office:value-type="float" office:value="0" calcext:value-type="float">
            <text:p>0,00</text:p>
          </table:table-cell>
          <table:table-cell table:style-name="Default" table:formula="of:=[.K20]/[.H20]" office:value-type="string" office:string-value="" calcext:value-type="error">
            <text:p>#DIV/0!</text:p>
          </table:table-cell>
          <table:table-cell table:formula="of:=SUM([.E20:.J20])" office:value-type="float" office:value="0" calcext:value-type="float">
            <text:p>0</text:p>
          </table:table-cell>
          <table:table-cell table:formula="of:=COUNTIFS([$'sanity-hybrid'.$C$1:$'sanity-hybrid'.$C$1048576];[.$A20];[$'sanity-hybrid'.$D$1:$'sanity-hybrid'.$D$1048576];[.$B20];[$'sanity-hybrid'.$E$1:$'sanity-hybrid'.$E$1048576];[.$C20];[$'sanity-hybrid'.$F$1:$'sanity-hybrid'.$F$1048576];[.$D20] )" office:value-type="float" office:value="0" calcext:value-type="float">
            <text:p>0</text:p>
          </table:table-cell>
          <table:table-cell table:style-name="ce69" table:formula="of:=[.M20]=[.N20]" office:value-type="boolean" office:boolean-value="true" calcext:value-type="boolean">
            <text:p>VRAI</text:p>
          </table:table-cell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&quot;NS&quot;)+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&quot;NS1&quot;)+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1];[$'sanity-hybrid'.$D$1:$'sanity-hybrid'.$D$1048576];[.$B21];[$'sanity-hybrid'.$E$1:$'sanity-hybrid'.$E$1048576];[.$C21];[$'sanity-hybrid'.$F$1:$'sanity-hybrid'.$F$1048576];[.$D21])" office:value-type="float" office:value="0" calcext:value-type="float">
            <text:p>0,00</text:p>
          </table:table-cell>
          <table:table-cell table:style-name="Default" table:formula="of:=[.K21]/[.H21]" office:value-type="string" office:string-value="" calcext:value-type="error">
            <text:p>#DIV/0!</text:p>
          </table:table-cell>
          <table:table-cell table:formula="of:=SUM([.E21:.J21])" office:value-type="float" office:value="0" calcext:value-type="float">
            <text:p>0</text:p>
          </table:table-cell>
          <table:table-cell table:formula="of:=COUNTIFS([$'sanity-hybrid'.$C$1:$'sanity-hybrid'.$C$1048576];[.$A21];[$'sanity-hybrid'.$D$1:$'sanity-hybrid'.$D$1048576];[.$B21];[$'sanity-hybrid'.$E$1:$'sanity-hybrid'.$E$1048576];[.$C21];[$'sanity-hybrid'.$F$1:$'sanity-hybrid'.$F$1048576];[.$D21] )" office:value-type="float" office:value="0" calcext:value-type="float">
            <text:p>0</text:p>
          </table:table-cell>
          <table:table-cell table:style-name="ce69" table:formula="of:=[.M21]=[.N21]" office:value-type="boolean" office:boolean-value="true" calcext:value-type="boolean">
            <text:p>VRAI</text:p>
          </table:table-cell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&quot;NS&quot;)+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&quot;NS1&quot;)+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2];[$'sanity-hybrid'.$D$1:$'sanity-hybrid'.$D$1048576];[.$B22];[$'sanity-hybrid'.$E$1:$'sanity-hybrid'.$E$1048576];[.$C22];[$'sanity-hybrid'.$F$1:$'sanity-hybrid'.$F$1048576];[.$D22])" office:value-type="float" office:value="0" calcext:value-type="float">
            <text:p>0,00</text:p>
          </table:table-cell>
          <table:table-cell table:style-name="Default" table:formula="of:=[.K22]/[.H22]" office:value-type="string" office:string-value="" calcext:value-type="error">
            <text:p>#DIV/0!</text:p>
          </table:table-cell>
          <table:table-cell table:formula="of:=SUM([.E22:.J22])" office:value-type="float" office:value="0" calcext:value-type="float">
            <text:p>0</text:p>
          </table:table-cell>
          <table:table-cell table:formula="of:=COUNTIFS([$'sanity-hybrid'.$C$1:$'sanity-hybrid'.$C$1048576];[.$A22];[$'sanity-hybrid'.$D$1:$'sanity-hybrid'.$D$1048576];[.$B22];[$'sanity-hybrid'.$E$1:$'sanity-hybrid'.$E$1048576];[.$C22];[$'sanity-hybrid'.$F$1:$'sanity-hybrid'.$F$1048576];[.$D22] )" office:value-type="float" office:value="0" calcext:value-type="float">
            <text:p>0</text:p>
          </table:table-cell>
          <table:table-cell table:style-name="ce69" table:formula="of:=[.M22]=[.N22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5" office:value-type="string" calcext:value-type="string">
            <text:p>Greet</text:p>
          </table:table-cell>
          <table:table-cell table:style-name="ce8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&quot;NS&quot;)+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&quot;NS1&quot;)+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3];[$'sanity-hybrid'.$D$1:$'sanity-hybrid'.$D$1048576];[.$B23];[$'sanity-hybrid'.$E$1:$'sanity-hybrid'.$E$1048576];[.$C23];[$'sanity-hybrid'.$F$1:$'sanity-hybrid'.$F$1048576];[.$D23])" office:value-type="float" office:value="0" calcext:value-type="float">
            <text:p>0,00</text:p>
          </table:table-cell>
          <table:table-cell table:style-name="Default" table:formula="of:=[.K23]/[.H23]" office:value-type="string" office:string-value="" calcext:value-type="error">
            <text:p>#DIV/0!</text:p>
          </table:table-cell>
          <table:table-cell table:formula="of:=SUM([.E23:.J23])" office:value-type="float" office:value="0" calcext:value-type="float">
            <text:p>0</text:p>
          </table:table-cell>
          <table:table-cell table:formula="of:=COUNTIFS([$'sanity-hybrid'.$C$1:$'sanity-hybrid'.$C$1048576];[.$A23];[$'sanity-hybrid'.$D$1:$'sanity-hybrid'.$D$1048576];[.$B23];[$'sanity-hybrid'.$E$1:$'sanity-hybrid'.$E$1048576];[.$C23];[$'sanity-hybrid'.$F$1:$'sanity-hybrid'.$F$1048576];[.$D23] )" office:value-type="float" office:value="0" calcext:value-type="float">
            <text:p>0</text:p>
          </table:table-cell>
          <table:table-cell table:style-name="ce69" table:formula="of:=[.M23]=[.N23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U-DC'.$C$1:$'U-DC'.$C$1048576];[.$Q23];[$'U-DC'.$D$1:$'U-DC'.$D$1048576];[.$R23];[$'U-DC'.$E$1:$'U-DC'.$E$1048576];[.$S23];[$'U-DC'.$F$1:$'U-DC'.$F$1048576];[.$T23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3];[$'U-DC'.$D$1:$'U-DC'.$D$1048576];[.$R23];[$'U-DC'.$E$1:$'U-DC'.$E$1048576];[.$S23];[$'U-DC'.$F$1:$'U-DC'.$F$1048576];[.$T23];[$'U-DC'.$N$1:$'U-DC'.$N$1048576];[.V$6])" office:value-type="float" office:value="0" calcext:value-type="float">
            <text:p>0</text:p>
          </table:table-cell>
          <table:table-cell table:formula="of:=COUNTIFS([$'U-DC'.$C$1:$'U-DC'.$C$1048576];[.$Q23];[$'U-DC'.$D$1:$'U-DC'.$D$1048576];[.$R23];[$'U-DC'.$E$1:$'U-DC'.$E$1048576];[.$S23];[$'U-DC'.$F$1:$'U-DC'.$F$1048576];[.$T23];[$'U-DC'.$N$1:$'U-DC'.$N$1048576];[.W$6])" office:value-type="float" office:value="0" calcext:value-type="float">
            <text:p>0</text:p>
          </table:table-cell>
          <table:table-cell table:formula="of:=COUNTIFS([$'U-DC'.$B$1:$'U-DC'.$B$1048576];[.$Q23];[$'U-DC'.$C$1:$'U-DC'.$C$1048576];[.$R23];[$'U-DC'.$D$1:$'U-DC'.$D$1048576];[.$S23];[$'U-DC'.$E$1:$'U-DC'.$E$1048576];[.$T23];[$'U-DC'.$M$1:$'U-DC'.$M$1048576];&quot;NS&quot;)+COUNTIFS([$'U-DC'.$B$1:$'U-DC'.$B$1048576];[.$Q23];[$'U-DC'.$C$1:$'U-DC'.$C$1048576];[.$R23];[$'U-DC'.$D$1:$'U-DC'.$D$1048576];[.$S23];[$'U-DC'.$E$1:$'U-DC'.$E$1048576];[.$T23];[$'U-DC'.$M$1:$'U-DC'.$M$1048576];&quot;NS1&quot;)+COUNTIFS([$'U-DC'.$B$1:$'U-DC'.$B$1048576];[.$Q23];[$'U-DC'.$C$1:$'U-DC'.$C$1048576];[.$R23];[$'U-DC'.$D$1:$'U-DC'.$D$1048576];[.$S23];[$'U-DC'.$E$1:$'U-DC'.$E$1048576];[.$T23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3];[$'U-DC'.$D$1:$'U-DC'.$D$1048576];[.$R23];[$'U-DC'.$E$1:$'U-DC'.$E$1048576];[.$S23];[$'U-DC'.$F$1:$'U-DC'.$F$1048576];[.$T23];[$'U-DC'.$N$1:$'U-DC'.$N$1048576];[.Y$6])" office:value-type="float" office:value="0" calcext:value-type="float">
            <text:p>0</text:p>
          </table:table-cell>
          <table:table-cell table:formula="of:=COUNTIFS([$'U-DC'.$C$1:$'U-DC'.$C$1048576];[.$Q23];[$'U-DC'.$D$1:$'U-DC'.$D$1048576];[.$R23];[$'U-DC'.$E$1:$'U-DC'.$E$1048576];[.$S23];[$'U-DC'.$F$1:$'U-DC'.$F$1048576];[.$T23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3];[$'U-DC'.$D$1:$'U-DC'.$D$1048576];[.$R23];[$'U-DC'.$E$1:$'U-DC'.$E$1048576];[.$S23];[$'U-DC'.$F$1:$'U-DC'.$F$1048576];[.$T23])" office:value-type="float" office:value="0" calcext:value-type="float">
            <text:p>0</text:p>
          </table:table-cell>
          <table:table-cell table:formula="of:=[.AA23]/[.U23]" office:value-type="string" office:string-value="" calcext:value-type="error">
            <text:p>#DIV/0!</text:p>
          </table:table-cell>
          <table:table-cell table:formula="of:=SUM([.U23:.Z23])" office:value-type="float" office:value="0" calcext:value-type="float">
            <text:p>0</text:p>
          </table:table-cell>
          <table:table-cell table:formula="of:=COUNTIFS([$'U-DC'.$C$1:$'U-DC'.$C$1048576];[.$Q23];[$'U-DC'.$D$1:$'U-DC'.$D$1048576];[.$R23];[$'U-DC'.$E$1:$'U-DC'.$E$1048576];[.$S23];[$'U-DC'.$F$1:$'U-DC'.$F$1048576];[.$T23])" office:value-type="float" office:value="0" calcext:value-type="float">
            <text:p>0</text:p>
          </table:table-cell>
          <table:table-cell table:style-name="ce69" table:formula="of:=[.AC23]=[.AD23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&quot;NS&quot;)+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&quot;NS1&quot;)+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4];[$'sanity-hybrid'.$D$1:$'sanity-hybrid'.$D$1048576];[.$B24];[$'sanity-hybrid'.$E$1:$'sanity-hybrid'.$E$1048576];[.$C24];[$'sanity-hybrid'.$F$1:$'sanity-hybrid'.$F$1048576];[.$D24])" office:value-type="float" office:value="0" calcext:value-type="float">
            <text:p>0,00</text:p>
          </table:table-cell>
          <table:table-cell table:style-name="Default" table:formula="of:=[.K24]/[.H24]" office:value-type="string" office:string-value="" calcext:value-type="error">
            <text:p>#DIV/0!</text:p>
          </table:table-cell>
          <table:table-cell table:formula="of:=SUM([.E24:.J24])" office:value-type="float" office:value="0" calcext:value-type="float">
            <text:p>0</text:p>
          </table:table-cell>
          <table:table-cell table:formula="of:=COUNTIFS([$'sanity-hybrid'.$C$1:$'sanity-hybrid'.$C$1048576];[.$A24];[$'sanity-hybrid'.$D$1:$'sanity-hybrid'.$D$1048576];[.$B24];[$'sanity-hybrid'.$E$1:$'sanity-hybrid'.$E$1048576];[.$C24];[$'sanity-hybrid'.$F$1:$'sanity-hybrid'.$F$1048576];[.$D24] )" office:value-type="float" office:value="0" calcext:value-type="float">
            <text:p>0</text:p>
          </table:table-cell>
          <table:table-cell table:style-name="ce69" table:formula="of:=[.M24]=[.N24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U-DC'.$C$1:$'U-DC'.$C$1048576];[.$Q24];[$'U-DC'.$D$1:$'U-DC'.$D$1048576];[.$R24];[$'U-DC'.$E$1:$'U-DC'.$E$1048576];[.$S24];[$'U-DC'.$F$1:$'U-DC'.$F$1048576];[.$T24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4];[$'U-DC'.$D$1:$'U-DC'.$D$1048576];[.$R24];[$'U-DC'.$E$1:$'U-DC'.$E$1048576];[.$S24];[$'U-DC'.$F$1:$'U-DC'.$F$1048576];[.$T24];[$'U-DC'.$N$1:$'U-DC'.$N$1048576];[.V$6])" office:value-type="float" office:value="0" calcext:value-type="float">
            <text:p>0</text:p>
          </table:table-cell>
          <table:table-cell table:formula="of:=COUNTIFS([$'U-DC'.$C$1:$'U-DC'.$C$1048576];[.$Q24];[$'U-DC'.$D$1:$'U-DC'.$D$1048576];[.$R24];[$'U-DC'.$E$1:$'U-DC'.$E$1048576];[.$S24];[$'U-DC'.$F$1:$'U-DC'.$F$1048576];[.$T24];[$'U-DC'.$N$1:$'U-DC'.$N$1048576];[.W$6])" office:value-type="float" office:value="0" calcext:value-type="float">
            <text:p>0</text:p>
          </table:table-cell>
          <table:table-cell table:formula="of:=COUNTIFS([$'U-DC'.$B$1:$'U-DC'.$B$1048576];[.$Q24];[$'U-DC'.$C$1:$'U-DC'.$C$1048576];[.$R24];[$'U-DC'.$D$1:$'U-DC'.$D$1048576];[.$S24];[$'U-DC'.$E$1:$'U-DC'.$E$1048576];[.$T24];[$'U-DC'.$M$1:$'U-DC'.$M$1048576];&quot;NS&quot;)+COUNTIFS([$'U-DC'.$B$1:$'U-DC'.$B$1048576];[.$Q24];[$'U-DC'.$C$1:$'U-DC'.$C$1048576];[.$R24];[$'U-DC'.$D$1:$'U-DC'.$D$1048576];[.$S24];[$'U-DC'.$E$1:$'U-DC'.$E$1048576];[.$T24];[$'U-DC'.$M$1:$'U-DC'.$M$1048576];&quot;NS1&quot;)+COUNTIFS([$'U-DC'.$B$1:$'U-DC'.$B$1048576];[.$Q24];[$'U-DC'.$C$1:$'U-DC'.$C$1048576];[.$R24];[$'U-DC'.$D$1:$'U-DC'.$D$1048576];[.$S24];[$'U-DC'.$E$1:$'U-DC'.$E$1048576];[.$T24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4];[$'U-DC'.$D$1:$'U-DC'.$D$1048576];[.$R24];[$'U-DC'.$E$1:$'U-DC'.$E$1048576];[.$S24];[$'U-DC'.$F$1:$'U-DC'.$F$1048576];[.$T24];[$'U-DC'.$N$1:$'U-DC'.$N$1048576];[.Y$6])" office:value-type="float" office:value="0" calcext:value-type="float">
            <text:p>0</text:p>
          </table:table-cell>
          <table:table-cell table:formula="of:=COUNTIFS([$'U-DC'.$C$1:$'U-DC'.$C$1048576];[.$Q24];[$'U-DC'.$D$1:$'U-DC'.$D$1048576];[.$R24];[$'U-DC'.$E$1:$'U-DC'.$E$1048576];[.$S24];[$'U-DC'.$F$1:$'U-DC'.$F$1048576];[.$T24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4];[$'U-DC'.$D$1:$'U-DC'.$D$1048576];[.$R24];[$'U-DC'.$E$1:$'U-DC'.$E$1048576];[.$S24];[$'U-DC'.$F$1:$'U-DC'.$F$1048576];[.$T24])" office:value-type="float" office:value="0" calcext:value-type="float">
            <text:p>0</text:p>
          </table:table-cell>
          <table:table-cell table:formula="of:=[.AA24]/[.U24]" office:value-type="string" office:string-value="" calcext:value-type="error">
            <text:p>#DIV/0!</text:p>
          </table:table-cell>
          <table:table-cell table:formula="of:=SUM([.U24:.Z24])" office:value-type="float" office:value="0" calcext:value-type="float">
            <text:p>0</text:p>
          </table:table-cell>
          <table:table-cell table:formula="of:=COUNTIFS([$'U-DC'.$C$1:$'U-DC'.$C$1048576];[.$Q24];[$'U-DC'.$D$1:$'U-DC'.$D$1048576];[.$R24];[$'U-DC'.$E$1:$'U-DC'.$E$1048576];[.$S24];[$'U-DC'.$F$1:$'U-DC'.$F$1048576];[.$T24])" office:value-type="float" office:value="0" calcext:value-type="float">
            <text:p>0</text:p>
          </table:table-cell>
          <table:table-cell table:style-name="ce69" table:formula="of:=[.AC24]=[.AD24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/>
          <table:table-cell table:style-name="ce50"/>
          <table:table-cell table:style-name="ce54"/>
          <table:table-cell table:style-name="ce51"/>
          <table:table-cell table:number-columns-repeated="2"/>
          <table:table-cell table:formula="of:=COUNTIFS([$'sanity-hybrid'.$C$1:$'sanity-hybrid'.$C$1048576];[.$A25];[$'sanity-hybrid'.$D$1:$'sanity-hybrid'.$D$1048576];[.$B25];[$'sanity-hybrid'.$E$1:$'sanity-hybrid'.$E$1048576];[.$C25];[$'sanity-hybrid'.$F$1:$'sanity-hybrid'.$F$1048576];[.$D25];[$'sanity-hybrid'.$N$1:$'sanity-hybrid'.$N$1048576];&quot;NS&quot;)+COUNTIFS([$'sanity-hybrid'.$C$1:$'sanity-hybrid'.$C$1048576];[.$A25];[$'sanity-hybrid'.$D$1:$'sanity-hybrid'.$D$1048576];[.$B25];[$'sanity-hybrid'.$E$1:$'sanity-hybrid'.$E$1048576];[.$C25];[$'sanity-hybrid'.$F$1:$'sanity-hybrid'.$F$1048576];[.$D25];[$'sanity-hybrid'.$N$1:$'sanity-hybrid'.$N$1048576];&quot;NS1&quot;)+COUNTIFS([$'sanity-hybrid'.$C$1:$'sanity-hybrid'.$C$1048576];[.$A25];[$'sanity-hybrid'.$D$1:$'sanity-hybrid'.$D$1048576];[.$B25];[$'sanity-hybrid'.$E$1:$'sanity-hybrid'.$E$1048576];[.$C25];[$'sanity-hybrid'.$F$1:$'sanity-hybrid'.$F$1048576];[.$D25];[$'sanity-hybrid'.$N$1:$'sanity-hybrid'.$N$1048576];&quot;NS2&quot;)" office:value-type="float" office:value="0" calcext:value-type="float">
            <text:p>0</text:p>
          </table:table-cell>
          <table:table-cell table:style-name="ce26"/>
          <table:table-cell table:number-columns-repeated="3"/>
          <table:table-cell table:style-name="Default"/>
          <table:table-cell table:number-columns-repeated="4"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U-DC'.$C$1:$'U-DC'.$C$1048576];[.$Q25];[$'U-DC'.$D$1:$'U-DC'.$D$1048576];[.$R25];[$'U-DC'.$E$1:$'U-DC'.$E$1048576];[.$S25];[$'U-DC'.$F$1:$'U-DC'.$F$1048576];[.$T25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5];[$'U-DC'.$D$1:$'U-DC'.$D$1048576];[.$R25];[$'U-DC'.$E$1:$'U-DC'.$E$1048576];[.$S25];[$'U-DC'.$F$1:$'U-DC'.$F$1048576];[.$T25];[$'U-DC'.$N$1:$'U-DC'.$N$1048576];[.V$6])" office:value-type="float" office:value="0" calcext:value-type="float">
            <text:p>0</text:p>
          </table:table-cell>
          <table:table-cell table:formula="of:=COUNTIFS([$'U-DC'.$C$1:$'U-DC'.$C$1048576];[.$Q25];[$'U-DC'.$D$1:$'U-DC'.$D$1048576];[.$R25];[$'U-DC'.$E$1:$'U-DC'.$E$1048576];[.$S25];[$'U-DC'.$F$1:$'U-DC'.$F$1048576];[.$T25];[$'U-DC'.$N$1:$'U-DC'.$N$1048576];[.W$6])" office:value-type="float" office:value="0" calcext:value-type="float">
            <text:p>0</text:p>
          </table:table-cell>
          <table:table-cell table:formula="of:=COUNTIFS([$'U-DC'.$B$1:$'U-DC'.$B$1048576];[.$Q25];[$'U-DC'.$C$1:$'U-DC'.$C$1048576];[.$R25];[$'U-DC'.$D$1:$'U-DC'.$D$1048576];[.$S25];[$'U-DC'.$E$1:$'U-DC'.$E$1048576];[.$T25];[$'U-DC'.$M$1:$'U-DC'.$M$1048576];&quot;NS&quot;)+COUNTIFS([$'U-DC'.$B$1:$'U-DC'.$B$1048576];[.$Q25];[$'U-DC'.$C$1:$'U-DC'.$C$1048576];[.$R25];[$'U-DC'.$D$1:$'U-DC'.$D$1048576];[.$S25];[$'U-DC'.$E$1:$'U-DC'.$E$1048576];[.$T25];[$'U-DC'.$M$1:$'U-DC'.$M$1048576];&quot;NS1&quot;)+COUNTIFS([$'U-DC'.$B$1:$'U-DC'.$B$1048576];[.$Q25];[$'U-DC'.$C$1:$'U-DC'.$C$1048576];[.$R25];[$'U-DC'.$D$1:$'U-DC'.$D$1048576];[.$S25];[$'U-DC'.$E$1:$'U-DC'.$E$1048576];[.$T25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5];[$'U-DC'.$D$1:$'U-DC'.$D$1048576];[.$R25];[$'U-DC'.$E$1:$'U-DC'.$E$1048576];[.$S25];[$'U-DC'.$F$1:$'U-DC'.$F$1048576];[.$T25];[$'U-DC'.$N$1:$'U-DC'.$N$1048576];[.Y$6])" office:value-type="float" office:value="0" calcext:value-type="float">
            <text:p>0</text:p>
          </table:table-cell>
          <table:table-cell table:formula="of:=COUNTIFS([$'U-DC'.$C$1:$'U-DC'.$C$1048576];[.$Q25];[$'U-DC'.$D$1:$'U-DC'.$D$1048576];[.$R25];[$'U-DC'.$E$1:$'U-DC'.$E$1048576];[.$S25];[$'U-DC'.$F$1:$'U-DC'.$F$1048576];[.$T25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5];[$'U-DC'.$D$1:$'U-DC'.$D$1048576];[.$R25];[$'U-DC'.$E$1:$'U-DC'.$E$1048576];[.$S25];[$'U-DC'.$F$1:$'U-DC'.$F$1048576];[.$T25])" office:value-type="float" office:value="0" calcext:value-type="float">
            <text:p>0</text:p>
          </table:table-cell>
          <table:table-cell table:formula="of:=[.AA25]/[.U25]" office:value-type="string" office:string-value="" calcext:value-type="error">
            <text:p>#DIV/0!</text:p>
          </table:table-cell>
          <table:table-cell table:formula="of:=SUM([.U25:.Z25])" office:value-type="float" office:value="0" calcext:value-type="float">
            <text:p>0</text:p>
          </table:table-cell>
          <table:table-cell table:formula="of:=COUNTIFS([$'U-DC'.$C$1:$'U-DC'.$C$1048576];[.$Q25];[$'U-DC'.$D$1:$'U-DC'.$D$1048576];[.$R25];[$'U-DC'.$E$1:$'U-DC'.$E$1048576];[.$S25];[$'U-DC'.$F$1:$'U-DC'.$F$1048576];[.$T25])" office:value-type="float" office:value="0" calcext:value-type="float">
            <text:p>0</text:p>
          </table:table-cell>
          <table:table-cell table:style-name="ce69" table:formula="of:=[.AC25]=[.AD25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OE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&quot;NS&quot;)+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&quot;NS1&quot;)+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6];[$'sanity-hybrid'.$D$1:$'sanity-hybrid'.$D$1048576];[.$B26];[$'sanity-hybrid'.$E$1:$'sanity-hybrid'.$E$1048576];[.$C26];[$'sanity-hybrid'.$F$1:$'sanity-hybrid'.$F$1048576];[.$D26])" office:value-type="float" office:value="0" calcext:value-type="float">
            <text:p>0,00</text:p>
          </table:table-cell>
          <table:table-cell table:style-name="Default" table:formula="of:=[.K26]/[.H26]" office:value-type="string" office:string-value="" calcext:value-type="error">
            <text:p>#DIV/0!</text:p>
          </table:table-cell>
          <table:table-cell table:formula="of:=SUM([.E26:.J26])" office:value-type="float" office:value="0" calcext:value-type="float">
            <text:p>0</text:p>
          </table:table-cell>
          <table:table-cell table:formula="of:=COUNTIFS([$'sanity-hybrid'.$C$1:$'sanity-hybrid'.$C$1048576];[.$A26];[$'sanity-hybrid'.$D$1:$'sanity-hybrid'.$D$1048576];[.$B26];[$'sanity-hybrid'.$E$1:$'sanity-hybrid'.$E$1048576];[.$C26];[$'sanity-hybrid'.$F$1:$'sanity-hybrid'.$F$1048576];[.$D26] )" office:value-type="float" office:value="0" calcext:value-type="float">
            <text:p>0</text:p>
          </table:table-cell>
          <table:table-cell table:style-name="ce69" table:formula="of:=[.M26]=[.N26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U-DC'.$C$1:$'U-DC'.$C$1048576];[.$Q26];[$'U-DC'.$D$1:$'U-DC'.$D$1048576];[.$R26];[$'U-DC'.$E$1:$'U-DC'.$E$1048576];[.$S26];[$'U-DC'.$F$1:$'U-DC'.$F$1048576];[.$T26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6];[$'U-DC'.$D$1:$'U-DC'.$D$1048576];[.$R26];[$'U-DC'.$E$1:$'U-DC'.$E$1048576];[.$S26];[$'U-DC'.$F$1:$'U-DC'.$F$1048576];[.$T26];[$'U-DC'.$N$1:$'U-DC'.$N$1048576];[.V$6])" office:value-type="float" office:value="0" calcext:value-type="float">
            <text:p>0</text:p>
          </table:table-cell>
          <table:table-cell table:formula="of:=COUNTIFS([$'U-DC'.$C$1:$'U-DC'.$C$1048576];[.$Q26];[$'U-DC'.$D$1:$'U-DC'.$D$1048576];[.$R26];[$'U-DC'.$E$1:$'U-DC'.$E$1048576];[.$S26];[$'U-DC'.$F$1:$'U-DC'.$F$1048576];[.$T26];[$'U-DC'.$N$1:$'U-DC'.$N$1048576];[.W$6])" office:value-type="float" office:value="0" calcext:value-type="float">
            <text:p>0</text:p>
          </table:table-cell>
          <table:table-cell table:formula="of:=COUNTIFS([$'U-DC'.$B$1:$'U-DC'.$B$1048576];[.$Q26];[$'U-DC'.$C$1:$'U-DC'.$C$1048576];[.$R26];[$'U-DC'.$D$1:$'U-DC'.$D$1048576];[.$S26];[$'U-DC'.$E$1:$'U-DC'.$E$1048576];[.$T26];[$'U-DC'.$M$1:$'U-DC'.$M$1048576];&quot;NS&quot;)+COUNTIFS([$'U-DC'.$B$1:$'U-DC'.$B$1048576];[.$Q26];[$'U-DC'.$C$1:$'U-DC'.$C$1048576];[.$R26];[$'U-DC'.$D$1:$'U-DC'.$D$1048576];[.$S26];[$'U-DC'.$E$1:$'U-DC'.$E$1048576];[.$T26];[$'U-DC'.$M$1:$'U-DC'.$M$1048576];&quot;NS1&quot;)+COUNTIFS([$'U-DC'.$B$1:$'U-DC'.$B$1048576];[.$Q26];[$'U-DC'.$C$1:$'U-DC'.$C$1048576];[.$R26];[$'U-DC'.$D$1:$'U-DC'.$D$1048576];[.$S26];[$'U-DC'.$E$1:$'U-DC'.$E$1048576];[.$T26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6];[$'U-DC'.$D$1:$'U-DC'.$D$1048576];[.$R26];[$'U-DC'.$E$1:$'U-DC'.$E$1048576];[.$S26];[$'U-DC'.$F$1:$'U-DC'.$F$1048576];[.$T26];[$'U-DC'.$N$1:$'U-DC'.$N$1048576];[.Y$6])" office:value-type="float" office:value="0" calcext:value-type="float">
            <text:p>0</text:p>
          </table:table-cell>
          <table:table-cell table:formula="of:=COUNTIFS([$'U-DC'.$C$1:$'U-DC'.$C$1048576];[.$Q26];[$'U-DC'.$D$1:$'U-DC'.$D$1048576];[.$R26];[$'U-DC'.$E$1:$'U-DC'.$E$1048576];[.$S26];[$'U-DC'.$F$1:$'U-DC'.$F$1048576];[.$T26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6];[$'U-DC'.$D$1:$'U-DC'.$D$1048576];[.$R26];[$'U-DC'.$E$1:$'U-DC'.$E$1048576];[.$S26];[$'U-DC'.$F$1:$'U-DC'.$F$1048576];[.$T26])" office:value-type="float" office:value="0" calcext:value-type="float">
            <text:p>0</text:p>
          </table:table-cell>
          <table:table-cell table:formula="of:=[.AA26]/[.U26]" office:value-type="string" office:string-value="" calcext:value-type="error">
            <text:p>#DIV/0!</text:p>
          </table:table-cell>
          <table:table-cell table:formula="of:=SUM([.U26:.Z26])" office:value-type="float" office:value="0" calcext:value-type="float">
            <text:p>0</text:p>
          </table:table-cell>
          <table:table-cell table:formula="of:=COUNTIFS([$'U-DC'.$C$1:$'U-DC'.$C$1048576];[.$Q26];[$'U-DC'.$D$1:$'U-DC'.$D$1048576];[.$R26];[$'U-DC'.$E$1:$'U-DC'.$E$1048576];[.$S26];[$'U-DC'.$F$1:$'U-DC'.$F$1048576];[.$T26])" office:value-type="float" office:value="0" calcext:value-type="float">
            <text:p>0</text:p>
          </table:table-cell>
          <table:table-cell table:style-name="ce69" table:formula="of:=[.AC26]=[.AD26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DM,OE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&quot;NS&quot;)+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&quot;NS1&quot;)+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7];[$'sanity-hybrid'.$D$1:$'sanity-hybrid'.$D$1048576];[.$B27];[$'sanity-hybrid'.$E$1:$'sanity-hybrid'.$E$1048576];[.$C27];[$'sanity-hybrid'.$F$1:$'sanity-hybrid'.$F$1048576];[.$D27])" office:value-type="float" office:value="0" calcext:value-type="float">
            <text:p>0,00</text:p>
          </table:table-cell>
          <table:table-cell table:style-name="Default" table:formula="of:=[.K27]/[.H27]" office:value-type="string" office:string-value="" calcext:value-type="error">
            <text:p>#DIV/0!</text:p>
          </table:table-cell>
          <table:table-cell table:formula="of:=SUM([.E27:.J27])" office:value-type="float" office:value="0" calcext:value-type="float">
            <text:p>0</text:p>
          </table:table-cell>
          <table:table-cell table:formula="of:=COUNTIFS([$'sanity-hybrid'.$C$1:$'sanity-hybrid'.$C$1048576];[.$A27];[$'sanity-hybrid'.$D$1:$'sanity-hybrid'.$D$1048576];[.$B27];[$'sanity-hybrid'.$E$1:$'sanity-hybrid'.$E$1048576];[.$C27];[$'sanity-hybrid'.$F$1:$'sanity-hybrid'.$F$1048576];[.$D27] )" office:value-type="float" office:value="0" calcext:value-type="float">
            <text:p>0</text:p>
          </table:table-cell>
          <table:table-cell table:style-name="ce69" table:formula="of:=[.M27]=[.N27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U-DC'.$C$1:$'U-DC'.$C$1048576];[.$Q27];[$'U-DC'.$D$1:$'U-DC'.$D$1048576];[.$R27];[$'U-DC'.$E$1:$'U-DC'.$E$1048576];[.$S27];[$'U-DC'.$F$1:$'U-DC'.$F$1048576];[.$T27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7];[$'U-DC'.$D$1:$'U-DC'.$D$1048576];[.$R27];[$'U-DC'.$E$1:$'U-DC'.$E$1048576];[.$S27];[$'U-DC'.$F$1:$'U-DC'.$F$1048576];[.$T27];[$'U-DC'.$N$1:$'U-DC'.$N$1048576];[.V$6])" office:value-type="float" office:value="0" calcext:value-type="float">
            <text:p>0</text:p>
          </table:table-cell>
          <table:table-cell table:formula="of:=COUNTIFS([$'U-DC'.$C$1:$'U-DC'.$C$1048576];[.$Q27];[$'U-DC'.$D$1:$'U-DC'.$D$1048576];[.$R27];[$'U-DC'.$E$1:$'U-DC'.$E$1048576];[.$S27];[$'U-DC'.$F$1:$'U-DC'.$F$1048576];[.$T27];[$'U-DC'.$N$1:$'U-DC'.$N$1048576];[.W$6])" office:value-type="float" office:value="0" calcext:value-type="float">
            <text:p>0</text:p>
          </table:table-cell>
          <table:table-cell table:formula="of:=COUNTIFS([$'U-DC'.$B$1:$'U-DC'.$B$1048576];[.$Q27];[$'U-DC'.$C$1:$'U-DC'.$C$1048576];[.$R27];[$'U-DC'.$D$1:$'U-DC'.$D$1048576];[.$S27];[$'U-DC'.$E$1:$'U-DC'.$E$1048576];[.$T27];[$'U-DC'.$M$1:$'U-DC'.$M$1048576];&quot;NS&quot;)+COUNTIFS([$'U-DC'.$B$1:$'U-DC'.$B$1048576];[.$Q27];[$'U-DC'.$C$1:$'U-DC'.$C$1048576];[.$R27];[$'U-DC'.$D$1:$'U-DC'.$D$1048576];[.$S27];[$'U-DC'.$E$1:$'U-DC'.$E$1048576];[.$T27];[$'U-DC'.$M$1:$'U-DC'.$M$1048576];&quot;NS1&quot;)+COUNTIFS([$'U-DC'.$B$1:$'U-DC'.$B$1048576];[.$Q27];[$'U-DC'.$C$1:$'U-DC'.$C$1048576];[.$R27];[$'U-DC'.$D$1:$'U-DC'.$D$1048576];[.$S27];[$'U-DC'.$E$1:$'U-DC'.$E$1048576];[.$T27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7];[$'U-DC'.$D$1:$'U-DC'.$D$1048576];[.$R27];[$'U-DC'.$E$1:$'U-DC'.$E$1048576];[.$S27];[$'U-DC'.$F$1:$'U-DC'.$F$1048576];[.$T27];[$'U-DC'.$N$1:$'U-DC'.$N$1048576];[.Y$6])" office:value-type="float" office:value="0" calcext:value-type="float">
            <text:p>0</text:p>
          </table:table-cell>
          <table:table-cell table:formula="of:=COUNTIFS([$'U-DC'.$C$1:$'U-DC'.$C$1048576];[.$Q27];[$'U-DC'.$D$1:$'U-DC'.$D$1048576];[.$R27];[$'U-DC'.$E$1:$'U-DC'.$E$1048576];[.$S27];[$'U-DC'.$F$1:$'U-DC'.$F$1048576];[.$T27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7];[$'U-DC'.$D$1:$'U-DC'.$D$1048576];[.$R27];[$'U-DC'.$E$1:$'U-DC'.$E$1048576];[.$S27];[$'U-DC'.$F$1:$'U-DC'.$F$1048576];[.$T27])" office:value-type="float" office:value="0" calcext:value-type="float">
            <text:p>0</text:p>
          </table:table-cell>
          <table:table-cell table:formula="of:=[.AA27]/[.U27]" office:value-type="string" office:string-value="" calcext:value-type="error">
            <text:p>#DIV/0!</text:p>
          </table:table-cell>
          <table:table-cell table:formula="of:=SUM([.U27:.Z27])" office:value-type="float" office:value="0" calcext:value-type="float">
            <text:p>0</text:p>
          </table:table-cell>
          <table:table-cell table:formula="of:=COUNTIFS([$'U-DC'.$C$1:$'U-DC'.$C$1048576];[.$Q27];[$'U-DC'.$D$1:$'U-DC'.$D$1048576];[.$R27];[$'U-DC'.$E$1:$'U-DC'.$E$1048576];[.$S27];[$'U-DC'.$F$1:$'U-DC'.$F$1048576];[.$T27])" office:value-type="float" office:value="0" calcext:value-type="float">
            <text:p>0</text:p>
          </table:table-cell>
          <table:table-cell table:style-name="ce69" table:formula="of:=[.AC27]=[.AD27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DM,NoOE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&quot;NS&quot;)+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&quot;NS1&quot;)+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8];[$'sanity-hybrid'.$D$1:$'sanity-hybrid'.$D$1048576];[.$B28];[$'sanity-hybrid'.$E$1:$'sanity-hybrid'.$E$1048576];[.$C28];[$'sanity-hybrid'.$F$1:$'sanity-hybrid'.$F$1048576];[.$D28])" office:value-type="float" office:value="0" calcext:value-type="float">
            <text:p>0,00</text:p>
          </table:table-cell>
          <table:table-cell table:style-name="Default" table:formula="of:=[.K28]/[.H28]" office:value-type="string" office:string-value="" calcext:value-type="error">
            <text:p>#DIV/0!</text:p>
          </table:table-cell>
          <table:table-cell table:formula="of:=SUM([.E28:.J28])" office:value-type="float" office:value="0" calcext:value-type="float">
            <text:p>0</text:p>
          </table:table-cell>
          <table:table-cell table:formula="of:=COUNTIFS([$'sanity-hybrid'.$C$1:$'sanity-hybrid'.$C$1048576];[.$A28];[$'sanity-hybrid'.$D$1:$'sanity-hybrid'.$D$1048576];[.$B28];[$'sanity-hybrid'.$E$1:$'sanity-hybrid'.$E$1048576];[.$C28];[$'sanity-hybrid'.$F$1:$'sanity-hybrid'.$F$1048576];[.$D28] )" office:value-type="float" office:value="0" calcext:value-type="float">
            <text:p>0</text:p>
          </table:table-cell>
          <table:table-cell table:style-name="ce69" table:formula="of:=[.M28]=[.N28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OE</text:p>
          </table:table-cell>
          <table:table-cell table:formula="of:=COUNTIFS([$'U-DC'.$C$1:$'U-DC'.$C$1048576];[.$Q28];[$'U-DC'.$D$1:$'U-DC'.$D$1048576];[.$R28];[$'U-DC'.$E$1:$'U-DC'.$E$1048576];[.$S28];[$'U-DC'.$F$1:$'U-DC'.$F$1048576];[.$T28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8];[$'U-DC'.$D$1:$'U-DC'.$D$1048576];[.$R28];[$'U-DC'.$E$1:$'U-DC'.$E$1048576];[.$S28];[$'U-DC'.$F$1:$'U-DC'.$F$1048576];[.$T28];[$'U-DC'.$N$1:$'U-DC'.$N$1048576];[.V$6])" office:value-type="float" office:value="0" calcext:value-type="float">
            <text:p>0</text:p>
          </table:table-cell>
          <table:table-cell table:formula="of:=COUNTIFS([$'U-DC'.$C$1:$'U-DC'.$C$1048576];[.$Q28];[$'U-DC'.$D$1:$'U-DC'.$D$1048576];[.$R28];[$'U-DC'.$E$1:$'U-DC'.$E$1048576];[.$S28];[$'U-DC'.$F$1:$'U-DC'.$F$1048576];[.$T28];[$'U-DC'.$N$1:$'U-DC'.$N$1048576];[.W$6])" office:value-type="float" office:value="0" calcext:value-type="float">
            <text:p>0</text:p>
          </table:table-cell>
          <table:table-cell table:formula="of:=COUNTIFS([$'U-DC'.$B$1:$'U-DC'.$B$1048576];[.$Q28];[$'U-DC'.$C$1:$'U-DC'.$C$1048576];[.$R28];[$'U-DC'.$D$1:$'U-DC'.$D$1048576];[.$S28];[$'U-DC'.$E$1:$'U-DC'.$E$1048576];[.$T28];[$'U-DC'.$M$1:$'U-DC'.$M$1048576];&quot;NS&quot;)+COUNTIFS([$'U-DC'.$B$1:$'U-DC'.$B$1048576];[.$Q28];[$'U-DC'.$C$1:$'U-DC'.$C$1048576];[.$R28];[$'U-DC'.$D$1:$'U-DC'.$D$1048576];[.$S28];[$'U-DC'.$E$1:$'U-DC'.$E$1048576];[.$T28];[$'U-DC'.$M$1:$'U-DC'.$M$1048576];&quot;NS1&quot;)+COUNTIFS([$'U-DC'.$B$1:$'U-DC'.$B$1048576];[.$Q28];[$'U-DC'.$C$1:$'U-DC'.$C$1048576];[.$R28];[$'U-DC'.$D$1:$'U-DC'.$D$1048576];[.$S28];[$'U-DC'.$E$1:$'U-DC'.$E$1048576];[.$T28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8];[$'U-DC'.$D$1:$'U-DC'.$D$1048576];[.$R28];[$'U-DC'.$E$1:$'U-DC'.$E$1048576];[.$S28];[$'U-DC'.$F$1:$'U-DC'.$F$1048576];[.$T28];[$'U-DC'.$N$1:$'U-DC'.$N$1048576];[.Y$6])" office:value-type="float" office:value="0" calcext:value-type="float">
            <text:p>0</text:p>
          </table:table-cell>
          <table:table-cell table:formula="of:=COUNTIFS([$'U-DC'.$C$1:$'U-DC'.$C$1048576];[.$Q28];[$'U-DC'.$D$1:$'U-DC'.$D$1048576];[.$R28];[$'U-DC'.$E$1:$'U-DC'.$E$1048576];[.$S28];[$'U-DC'.$F$1:$'U-DC'.$F$1048576];[.$T28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8];[$'U-DC'.$D$1:$'U-DC'.$D$1048576];[.$R28];[$'U-DC'.$E$1:$'U-DC'.$E$1048576];[.$S28];[$'U-DC'.$F$1:$'U-DC'.$F$1048576];[.$T28])" office:value-type="float" office:value="0" calcext:value-type="float">
            <text:p>0</text:p>
          </table:table-cell>
          <table:table-cell table:formula="of:=[.AA28]/[.U28]" office:value-type="string" office:string-value="" calcext:value-type="error">
            <text:p>#DIV/0!</text:p>
          </table:table-cell>
          <table:table-cell table:formula="of:=SUM([.U28:.Z28])" office:value-type="float" office:value="0" calcext:value-type="float">
            <text:p>0</text:p>
          </table:table-cell>
          <table:table-cell table:formula="of:=COUNTIFS([$'U-DC'.$C$1:$'U-DC'.$C$1048576];[.$Q28];[$'U-DC'.$D$1:$'U-DC'.$D$1048576];[.$R28];[$'U-DC'.$E$1:$'U-DC'.$E$1048576];[.$S28];[$'U-DC'.$F$1:$'U-DC'.$F$1048576];[.$T28])" office:value-type="float" office:value="0" calcext:value-type="float">
            <text:p>0</text:p>
          </table:table-cell>
          <table:table-cell table:style-name="ce69" table:formula="of:=[.AC28]=[.AD28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SQbrick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lifting</text:p>
          </table:table-cell>
          <table:table-cell table:style-name="ce53" office:value-type="string" calcext:value-type="string">
            <text:p>Sequence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&quot;NS&quot;)+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&quot;NS1&quot;)+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29];[$'sanity-hybrid'.$D$1:$'sanity-hybrid'.$D$1048576];[.$B29];[$'sanity-hybrid'.$E$1:$'sanity-hybrid'.$E$1048576];[.$C29];[$'sanity-hybrid'.$F$1:$'sanity-hybrid'.$F$1048576];[.$D29])" office:value-type="float" office:value="0" calcext:value-type="float">
            <text:p>0,00</text:p>
          </table:table-cell>
          <table:table-cell table:style-name="Default" table:formula="of:=[.K29]/[.H29]" office:value-type="string" office:string-value="" calcext:value-type="error">
            <text:p>#DIV/0!</text:p>
          </table:table-cell>
          <table:table-cell table:formula="of:=SUM([.E29:.J29])" office:value-type="float" office:value="0" calcext:value-type="float">
            <text:p>0</text:p>
          </table:table-cell>
          <table:table-cell table:formula="of:=COUNTIFS([$'sanity-hybrid'.$C$1:$'sanity-hybrid'.$C$1048576];[.$A29];[$'sanity-hybrid'.$D$1:$'sanity-hybrid'.$D$1048576];[.$B29];[$'sanity-hybrid'.$E$1:$'sanity-hybrid'.$E$1048576];[.$C29];[$'sanity-hybrid'.$F$1:$'sanity-hybrid'.$F$1048576];[.$D29] )" office:value-type="float" office:value="0" calcext:value-type="float">
            <text:p>0</text:p>
          </table:table-cell>
          <table:table-cell table:style-name="ce69" table:formula="of:=[.M29]=[.N29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DM,OE</text:p>
          </table:table-cell>
          <table:table-cell table:formula="of:=COUNTIFS([$'U-DC'.$C$1:$'U-DC'.$C$1048576];[.$Q29];[$'U-DC'.$D$1:$'U-DC'.$D$1048576];[.$R29];[$'U-DC'.$E$1:$'U-DC'.$E$1048576];[.$S29];[$'U-DC'.$F$1:$'U-DC'.$F$1048576];[.$T29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29];[$'U-DC'.$D$1:$'U-DC'.$D$1048576];[.$R29];[$'U-DC'.$E$1:$'U-DC'.$E$1048576];[.$S29];[$'U-DC'.$F$1:$'U-DC'.$F$1048576];[.$T29];[$'U-DC'.$N$1:$'U-DC'.$N$1048576];[.V$6])" office:value-type="float" office:value="0" calcext:value-type="float">
            <text:p>0</text:p>
          </table:table-cell>
          <table:table-cell table:formula="of:=COUNTIFS([$'U-DC'.$C$1:$'U-DC'.$C$1048576];[.$Q29];[$'U-DC'.$D$1:$'U-DC'.$D$1048576];[.$R29];[$'U-DC'.$E$1:$'U-DC'.$E$1048576];[.$S29];[$'U-DC'.$F$1:$'U-DC'.$F$1048576];[.$T29];[$'U-DC'.$N$1:$'U-DC'.$N$1048576];[.W$6])" office:value-type="float" office:value="0" calcext:value-type="float">
            <text:p>0</text:p>
          </table:table-cell>
          <table:table-cell table:formula="of:=COUNTIFS([$'U-DC'.$B$1:$'U-DC'.$B$1048576];[.$Q29];[$'U-DC'.$C$1:$'U-DC'.$C$1048576];[.$R29];[$'U-DC'.$D$1:$'U-DC'.$D$1048576];[.$S29];[$'U-DC'.$E$1:$'U-DC'.$E$1048576];[.$T29];[$'U-DC'.$M$1:$'U-DC'.$M$1048576];&quot;NS&quot;)+COUNTIFS([$'U-DC'.$B$1:$'U-DC'.$B$1048576];[.$Q29];[$'U-DC'.$C$1:$'U-DC'.$C$1048576];[.$R29];[$'U-DC'.$D$1:$'U-DC'.$D$1048576];[.$S29];[$'U-DC'.$E$1:$'U-DC'.$E$1048576];[.$T29];[$'U-DC'.$M$1:$'U-DC'.$M$1048576];&quot;NS1&quot;)+COUNTIFS([$'U-DC'.$B$1:$'U-DC'.$B$1048576];[.$Q29];[$'U-DC'.$C$1:$'U-DC'.$C$1048576];[.$R29];[$'U-DC'.$D$1:$'U-DC'.$D$1048576];[.$S29];[$'U-DC'.$E$1:$'U-DC'.$E$1048576];[.$T29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29];[$'U-DC'.$D$1:$'U-DC'.$D$1048576];[.$R29];[$'U-DC'.$E$1:$'U-DC'.$E$1048576];[.$S29];[$'U-DC'.$F$1:$'U-DC'.$F$1048576];[.$T29];[$'U-DC'.$N$1:$'U-DC'.$N$1048576];[.Y$6])" office:value-type="float" office:value="0" calcext:value-type="float">
            <text:p>0</text:p>
          </table:table-cell>
          <table:table-cell table:formula="of:=COUNTIFS([$'U-DC'.$C$1:$'U-DC'.$C$1048576];[.$Q29];[$'U-DC'.$D$1:$'U-DC'.$D$1048576];[.$R29];[$'U-DC'.$E$1:$'U-DC'.$E$1048576];[.$S29];[$'U-DC'.$F$1:$'U-DC'.$F$1048576];[.$T29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29];[$'U-DC'.$D$1:$'U-DC'.$D$1048576];[.$R29];[$'U-DC'.$E$1:$'U-DC'.$E$1048576];[.$S29];[$'U-DC'.$F$1:$'U-DC'.$F$1048576];[.$T29])" office:value-type="float" office:value="0" calcext:value-type="float">
            <text:p>0</text:p>
          </table:table-cell>
          <table:table-cell table:formula="of:=[.AA29]/[.U29]" office:value-type="string" office:string-value="" calcext:value-type="error">
            <text:p>#DIV/0!</text:p>
          </table:table-cell>
          <table:table-cell table:formula="of:=SUM([.U29:.Z29])" office:value-type="float" office:value="0" calcext:value-type="float">
            <text:p>0</text:p>
          </table:table-cell>
          <table:table-cell table:formula="of:=COUNTIFS([$'U-DC'.$C$1:$'U-DC'.$C$1048576];[.$Q29];[$'U-DC'.$D$1:$'U-DC'.$D$1048576];[.$R29];[$'U-DC'.$E$1:$'U-DC'.$E$1048576];[.$S29];[$'U-DC'.$F$1:$'U-DC'.$F$1048576];[.$T29])" office:value-type="float" office:value="0" calcext:value-type="float">
            <text:p>0</text:p>
          </table:table-cell>
          <table:table-cell table:style-name="ce69" table:formula="of:=[.AC29]=[.AD29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[.E$6])" office:value-type="float" office:value="0" calcext:value-type="float">
            <text:p>0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[.F$6])" office:value-type="float" office:value="0" calcext:value-type="float">
            <text:p>0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&quot;NS&quot;)+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&quot;NS1&quot;)+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&quot;NS2&quot;)" office:value-type="float" office:value="0" calcext:value-type="float">
            <text:p>0</text:p>
          </table:table-cell>
          <table:table-cell table:style-name="ce26"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&quot;&gt;=0&quot;)" office:value-type="float" office:value="0" calcext:value-type="float">
            <text:p>0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[.I$6])" office:value-type="float" office:value="0" calcext:value-type="float">
            <text:p>0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;[$'sanity-hybrid'.$N$1:$'sanity-hybrid'.$N$1048576];[.J$6])" office:value-type="float" office:value="0" calcext:value-type="float">
            <text:p>0</text:p>
          </table:table-cell>
          <table:table-cell table:formula="of:=SUMIFS([$'sanity-hybrid'.$N$1:$'sanity-hybrid'.$N$1048576];[$'sanity-hybrid'.$C$1:$'sanity-hybrid'.$C$1048576];[.$A30];[$'sanity-hybrid'.$D$1:$'sanity-hybrid'.$D$1048576];[.$B30];[$'sanity-hybrid'.$E$1:$'sanity-hybrid'.$E$1048576];[.$C30];[$'sanity-hybrid'.$F$1:$'sanity-hybrid'.$F$1048576];[.$D30])" office:value-type="float" office:value="0" calcext:value-type="float">
            <text:p>0,00</text:p>
          </table:table-cell>
          <table:table-cell table:style-name="Default" table:formula="of:=[.K30]/[.H30]" office:value-type="string" office:string-value="" calcext:value-type="error">
            <text:p>#DIV/0!</text:p>
          </table:table-cell>
          <table:table-cell table:formula="of:=SUM([.E30:.J30])" office:value-type="float" office:value="0" calcext:value-type="float">
            <text:p>0</text:p>
          </table:table-cell>
          <table:table-cell table:formula="of:=COUNTIFS([$'sanity-hybrid'.$C$1:$'sanity-hybrid'.$C$1048576];[.$A30];[$'sanity-hybrid'.$D$1:$'sanity-hybrid'.$D$1048576];[.$B30];[$'sanity-hybrid'.$E$1:$'sanity-hybrid'.$E$1048576];[.$C30];[$'sanity-hybrid'.$F$1:$'sanity-hybrid'.$F$1048576];[.$D30] )" office:value-type="float" office:value="0" calcext:value-type="float">
            <text:p>0</text:p>
          </table:table-cell>
          <table:table-cell table:style-name="ce69" table:formula="of:=[.M30]=[.N30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formula="of:=COUNTIFS([$'U-DC'.$C$1:$'U-DC'.$C$1048576];[.$Q30];[$'U-DC'.$D$1:$'U-DC'.$D$1048576];[.$R30];[$'U-DC'.$E$1:$'U-DC'.$E$1048576];[.$S30];[$'U-DC'.$F$1:$'U-DC'.$F$1048576];[.$T30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30];[$'U-DC'.$D$1:$'U-DC'.$D$1048576];[.$R30];[$'U-DC'.$E$1:$'U-DC'.$E$1048576];[.$S30];[$'U-DC'.$F$1:$'U-DC'.$F$1048576];[.$T30];[$'U-DC'.$N$1:$'U-DC'.$N$1048576];[.V$6])" office:value-type="float" office:value="0" calcext:value-type="float">
            <text:p>0</text:p>
          </table:table-cell>
          <table:table-cell table:formula="of:=COUNTIFS([$'U-DC'.$C$1:$'U-DC'.$C$1048576];[.$Q30];[$'U-DC'.$D$1:$'U-DC'.$D$1048576];[.$R30];[$'U-DC'.$E$1:$'U-DC'.$E$1048576];[.$S30];[$'U-DC'.$F$1:$'U-DC'.$F$1048576];[.$T30];[$'U-DC'.$N$1:$'U-DC'.$N$1048576];[.W$6])" office:value-type="float" office:value="0" calcext:value-type="float">
            <text:p>0</text:p>
          </table:table-cell>
          <table:table-cell table:formula="of:=COUNTIFS([$'U-DC'.$B$1:$'U-DC'.$B$1048576];[.$Q30];[$'U-DC'.$C$1:$'U-DC'.$C$1048576];[.$R30];[$'U-DC'.$D$1:$'U-DC'.$D$1048576];[.$S30];[$'U-DC'.$E$1:$'U-DC'.$E$1048576];[.$T30];[$'U-DC'.$M$1:$'U-DC'.$M$1048576];&quot;NS&quot;)+COUNTIFS([$'U-DC'.$B$1:$'U-DC'.$B$1048576];[.$Q30];[$'U-DC'.$C$1:$'U-DC'.$C$1048576];[.$R30];[$'U-DC'.$D$1:$'U-DC'.$D$1048576];[.$S30];[$'U-DC'.$E$1:$'U-DC'.$E$1048576];[.$T30];[$'U-DC'.$M$1:$'U-DC'.$M$1048576];&quot;NS1&quot;)+COUNTIFS([$'U-DC'.$B$1:$'U-DC'.$B$1048576];[.$Q30];[$'U-DC'.$C$1:$'U-DC'.$C$1048576];[.$R30];[$'U-DC'.$D$1:$'U-DC'.$D$1048576];[.$S30];[$'U-DC'.$E$1:$'U-DC'.$E$1048576];[.$T30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30];[$'U-DC'.$D$1:$'U-DC'.$D$1048576];[.$R30];[$'U-DC'.$E$1:$'U-DC'.$E$1048576];[.$S30];[$'U-DC'.$F$1:$'U-DC'.$F$1048576];[.$T30];[$'U-DC'.$N$1:$'U-DC'.$N$1048576];[.Y$6])" office:value-type="float" office:value="0" calcext:value-type="float">
            <text:p>0</text:p>
          </table:table-cell>
          <table:table-cell table:formula="of:=COUNTIFS([$'U-DC'.$C$1:$'U-DC'.$C$1048576];[.$Q30];[$'U-DC'.$D$1:$'U-DC'.$D$1048576];[.$R30];[$'U-DC'.$E$1:$'U-DC'.$E$1048576];[.$S30];[$'U-DC'.$F$1:$'U-DC'.$F$1048576];[.$T30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30];[$'U-DC'.$D$1:$'U-DC'.$D$1048576];[.$R30];[$'U-DC'.$E$1:$'U-DC'.$E$1048576];[.$S30];[$'U-DC'.$F$1:$'U-DC'.$F$1048576];[.$T30])" office:value-type="float" office:value="0" calcext:value-type="float">
            <text:p>0</text:p>
          </table:table-cell>
          <table:table-cell table:formula="of:=[.AA30]/[.U30]" office:value-type="string" office:string-value="" calcext:value-type="error">
            <text:p>#DIV/0!</text:p>
          </table:table-cell>
          <table:table-cell table:formula="of:=SUM([.U30:.Z30])" office:value-type="float" office:value="0" calcext:value-type="float">
            <text:p>0</text:p>
          </table:table-cell>
          <table:table-cell table:formula="of:=COUNTIFS([$'U-DC'.$C$1:$'U-DC'.$C$1048576];[.$Q30];[$'U-DC'.$D$1:$'U-DC'.$D$1048576];[.$R30];[$'U-DC'.$E$1:$'U-DC'.$E$1048576];[.$S30];[$'U-DC'.$F$1:$'U-DC'.$F$1048576];[.$T30])" office:value-type="float" office:value="0" calcext:value-type="float">
            <text:p>0</text:p>
          </table:table-cell>
          <table:table-cell table:style-name="ce69" table:formula="of:=[.AC30]=[.AD30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5" table:number-columns-repeated="6"/>
          <table:table-cell table:style-name="ce62" table:number-columns-repeated="2"/>
          <table:table-cell table:number-columns-repeated="4"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U-DC'.$C$1:$'U-DC'.$C$1048576];[.$Q31];[$'U-DC'.$D$1:$'U-DC'.$D$1048576];[.$R31];[$'U-DC'.$E$1:$'U-DC'.$E$1048576];[.$S31];[$'U-DC'.$F$1:$'U-DC'.$F$1048576];[.$T31];[$'U-DC'.$N$1:$'U-DC'.$N$1048576];&quot;&gt;=0&quot;)" office:value-type="float" office:value="0" calcext:value-type="float">
            <text:p>0</text:p>
          </table:table-cell>
          <table:table-cell table:style-name="ce52" table:formula="of:=COUNTIFS([$'U-DC'.$C$1:$'U-DC'.$C$1048576];[.$Q31];[$'U-DC'.$D$1:$'U-DC'.$D$1048576];[.$R31];[$'U-DC'.$E$1:$'U-DC'.$E$1048576];[.$S31];[$'U-DC'.$F$1:$'U-DC'.$F$1048576];[.$T31];[$'U-DC'.$N$1:$'U-DC'.$N$1048576];[.V$6])" office:value-type="float" office:value="0" calcext:value-type="float">
            <text:p>0</text:p>
          </table:table-cell>
          <table:table-cell table:formula="of:=COUNTIFS([$'U-DC'.$C$1:$'U-DC'.$C$1048576];[.$Q31];[$'U-DC'.$D$1:$'U-DC'.$D$1048576];[.$R31];[$'U-DC'.$E$1:$'U-DC'.$E$1048576];[.$S31];[$'U-DC'.$F$1:$'U-DC'.$F$1048576];[.$T31];[$'U-DC'.$N$1:$'U-DC'.$N$1048576];[.W$6])" office:value-type="float" office:value="0" calcext:value-type="float">
            <text:p>0</text:p>
          </table:table-cell>
          <table:table-cell table:formula="of:=COUNTIFS([$'U-DC'.$B$1:$'U-DC'.$B$1048576];[.$Q31];[$'U-DC'.$C$1:$'U-DC'.$C$1048576];[.$R31];[$'U-DC'.$D$1:$'U-DC'.$D$1048576];[.$S31];[$'U-DC'.$E$1:$'U-DC'.$E$1048576];[.$T31];[$'U-DC'.$M$1:$'U-DC'.$M$1048576];&quot;NS&quot;)+COUNTIFS([$'U-DC'.$B$1:$'U-DC'.$B$1048576];[.$Q31];[$'U-DC'.$C$1:$'U-DC'.$C$1048576];[.$R31];[$'U-DC'.$D$1:$'U-DC'.$D$1048576];[.$S31];[$'U-DC'.$E$1:$'U-DC'.$E$1048576];[.$T31];[$'U-DC'.$M$1:$'U-DC'.$M$1048576];&quot;NS1&quot;)+COUNTIFS([$'U-DC'.$B$1:$'U-DC'.$B$1048576];[.$Q31];[$'U-DC'.$C$1:$'U-DC'.$C$1048576];[.$R31];[$'U-DC'.$D$1:$'U-DC'.$D$1048576];[.$S31];[$'U-DC'.$E$1:$'U-DC'.$E$1048576];[.$T31];[$'U-DC'.$M$1:$'U-DC'.$M$1048576];&quot;NS2&quot;)" office:value-type="float" office:value="0" calcext:value-type="float">
            <text:p>0</text:p>
          </table:table-cell>
          <table:table-cell table:formula="of:=COUNTIFS([$'U-DC'.$C$1:$'U-DC'.$C$1048576];[.$Q31];[$'U-DC'.$D$1:$'U-DC'.$D$1048576];[.$R31];[$'U-DC'.$E$1:$'U-DC'.$E$1048576];[.$S31];[$'U-DC'.$F$1:$'U-DC'.$F$1048576];[.$T31];[$'U-DC'.$N$1:$'U-DC'.$N$1048576];[.Y$6])" office:value-type="float" office:value="0" calcext:value-type="float">
            <text:p>0</text:p>
          </table:table-cell>
          <table:table-cell table:formula="of:=COUNTIFS([$'U-DC'.$C$1:$'U-DC'.$C$1048576];[.$Q31];[$'U-DC'.$D$1:$'U-DC'.$D$1048576];[.$R31];[$'U-DC'.$E$1:$'U-DC'.$E$1048576];[.$S31];[$'U-DC'.$F$1:$'U-DC'.$F$1048576];[.$T31];[$'U-DC'.$N$1:$'U-DC'.$N$1048576];[.Z$6])" office:value-type="float" office:value="0" calcext:value-type="float">
            <text:p>0</text:p>
          </table:table-cell>
          <table:table-cell table:formula="of:=SUMIFS([$'U-DC'.$N$1:$'U-DC'.$N$1048576];[$'U-DC'.$C$1:$'U-DC'.$C$1048576];[.$Q31];[$'U-DC'.$D$1:$'U-DC'.$D$1048576];[.$R31];[$'U-DC'.$E$1:$'U-DC'.$E$1048576];[.$S31];[$'U-DC'.$F$1:$'U-DC'.$F$1048576];[.$T31])" office:value-type="float" office:value="0" calcext:value-type="float">
            <text:p>0</text:p>
          </table:table-cell>
          <table:table-cell table:formula="of:=[.AA31]/[.U31]" office:value-type="string" office:string-value="" calcext:value-type="error">
            <text:p>#DIV/0!</text:p>
          </table:table-cell>
          <table:table-cell table:formula="of:=SUM([.U31:.Z31])" office:value-type="float" office:value="0" calcext:value-type="float">
            <text:p>0</text:p>
          </table:table-cell>
          <table:table-cell table:formula="of:=COUNTIFS([$'U-DC'.$C$1:$'U-DC'.$C$1048576];[.$Q31];[$'U-DC'.$D$1:$'U-DC'.$D$1048576];[.$R31];[$'U-DC'.$E$1:$'U-DC'.$E$1048576];[.$S31];[$'U-DC'.$F$1:$'U-DC'.$F$1048576];[.$T31])" office:value-type="float" office:value="0" calcext:value-type="float">
            <text:p>0</text:p>
          </table:table-cell>
          <table:table-cell table:style-name="ce69" table:formula="of:=[.AC31]=[.AD31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style-name="ce3" office:value-type="string" calcext:value-type="string" table:number-columns-spanned="15" table:number-rows-spanned="3">
            <text:p>Sanity Partial - Total : 9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11"/>
          <table:table-cell table:number-columns-repeated="21"/>
        </table:table-row>
        <table:table-row table:style-name="ro1"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number-columns-repeated="2" table:style-name="ce16"/>
          <table:table-cell/>
          <table:table-cell table:style-name="ce3" office:value-type="string" calcext:value-type="string" table:number-columns-spanned="15" table:number-rows-spanned="3">
            <text:p>DC-Q(DC)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3"/>
          <table:covered-table-cell table:style-name="ce80"/>
          <table:table-cell table:number-columns-repeated="5"/>
        </table:table-row>
        <table:table-row table:style-name="ro1"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number-columns-repeated="2" table:style-name="ce16"/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3" office:value-type="string" calcext:value-type="string">
            <text:p>Tool</text:p>
          </table:table-cell>
          <table:table-cell table:style-name="ce48" office:value-type="string" calcext:value-type="string">
            <text:p>Version</text:p>
          </table:table-cell>
          <table:table-cell table:style-name="ce43" office:value-type="string" calcext:value-type="string">
            <text:p>Lift</text:p>
          </table:table-cell>
          <table:table-cell table:style-name="ce43" office:value-type="string" calcext:value-type="string">
            <text:p>Opt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25" office:value-type="string" calcext:value-type="string">
            <text:p>Err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61" office:value-type="string" calcext:value-type="string">
            <text:p>TT</text:p>
          </table:table-cell>
          <table:table-cell table:style-name="ce64" office:value-type="string" calcext:value-type="string">
            <text:p>AT</text:p>
          </table:table-cell>
          <table:table-cell table:style-name="ce65" office:value-type="string" calcext:value-type="string">
            <text:p>Greet</text:p>
          </table:table-cell>
          <table:table-cell table:style-name="ce65" office:value-type="string" calcext:value-type="string">
            <text:p>Expect</text:p>
          </table:table-cell>
          <table:table-cell table:style-name="ce65" office:value-type="string" calcext:value-type="string">
            <text:p>Check</text:p>
          </table:table-cell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3" office:value-type="string" calcext:value-type="string">
            <text:p>SQbrick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lifting</text:p>
          </table:table-cell>
          <table:table-cell table:style-name="ce53" office:value-type="string" calcext:value-type="string">
            <text:p>Sequence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[.E$6])" office:value-type="float" office:value="0" calcext:value-type="float">
            <text:p>0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[.F$6])" office:value-type="float" office:value="0" calcext:value-type="float">
            <text:p>0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&quot;NS&quot;)+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&quot;NS1&quot;)+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&quot;NS2&quot;)" office:value-type="float" office:value="0" calcext:value-type="float">
            <text:p>0</text:p>
          </table:table-cell>
          <table:table-cell table:style-name="ce26"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&quot;&gt;=0&quot;)" office:value-type="float" office:value="0" calcext:value-type="float">
            <text:p>0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[.I$6])" office:value-type="float" office:value="0" calcext:value-type="float">
            <text:p>0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;[$'sanity-partial'.$N$1:$'sanity-partial'.$N$1048576];[.J$6])" office:value-type="float" office:value="0" calcext:value-type="float">
            <text:p>0</text:p>
          </table:table-cell>
          <table:table-cell table:formula="of:=SUMIFS([$'sanity-partial'.$N$1:$'sanity-partial'.$N$1048576];[$'sanity-partial'.$C$1:$'sanity-partial'.$C$1048576];[.$A37];[$'sanity-partial'.$D$1:$'sanity-partial'.$D$1048576];[.$B37];[$'sanity-partial'.$E$1:$'sanity-partial'.$E$1048576];[.$C37];[$'sanity-partial'.$F$1:$'sanity-partial'.$F$1048576];[.$D37])" office:value-type="float" office:value="0" calcext:value-type="float">
            <text:p>0,00</text:p>
          </table:table-cell>
          <table:table-cell table:style-name="Default" table:formula="of:=[.K37]/[.H37]" office:value-type="string" office:string-value="" calcext:value-type="error">
            <text:p>#DIV/0!</text:p>
          </table:table-cell>
          <table:table-cell table:formula="of:=SUM([.E37:.J37])" office:value-type="float" office:value="0" calcext:value-type="float">
            <text:p>0</text:p>
          </table:table-cell>
          <table:table-cell table:formula="of:=COUNTIFS([$'sanity-partial'.$C$1:$'sanity-partial'.$C$1048576];[.$A37];[$'sanity-partial'.$D$1:$'sanity-partial'.$D$1048576];[.$B37];[$'sanity-partial'.$E$1:$'sanity-partial'.$E$1048576];[.$C37];[$'sanity-partial'.$F$1:$'sanity-partial'.$F$1048576];[.$D37] )" office:value-type="float" office:value="0" calcext:value-type="float">
            <text:p>0</text:p>
          </table:table-cell>
          <table:table-cell table:style-name="ce69" table:formula="of:=[.M37]=[.N37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5" office:value-type="string" calcext:value-type="string">
            <text:p>Greet</text:p>
          </table:table-cell>
          <table:table-cell table:style-name="ce8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[.E$6])" office:value-type="float" office:value="0" calcext:value-type="float">
            <text:p>0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[.F$6])" office:value-type="float" office:value="0" calcext:value-type="float">
            <text:p>0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&quot;NS&quot;)+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&quot;NS1&quot;)+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&quot;NS2&quot;)" office:value-type="float" office:value="0" calcext:value-type="float">
            <text:p>0</text:p>
          </table:table-cell>
          <table:table-cell table:style-name="ce26"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&quot;&gt;=0&quot;)" office:value-type="float" office:value="0" calcext:value-type="float">
            <text:p>0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[.I$6])" office:value-type="float" office:value="0" calcext:value-type="float">
            <text:p>0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;[$'sanity-partial'.$N$1:$'sanity-partial'.$N$1048576];[.J$6])" office:value-type="float" office:value="0" calcext:value-type="float">
            <text:p>0</text:p>
          </table:table-cell>
          <table:table-cell table:formula="of:=SUMIFS([$'sanity-partial'.$N$1:$'sanity-partial'.$N$1048576];[$'sanity-partial'.$C$1:$'sanity-partial'.$C$1048576];[.$A38];[$'sanity-partial'.$D$1:$'sanity-partial'.$D$1048576];[.$B38];[$'sanity-partial'.$E$1:$'sanity-partial'.$E$1048576];[.$C38];[$'sanity-partial'.$F$1:$'sanity-partial'.$F$1048576];[.$D38])" office:value-type="float" office:value="0" calcext:value-type="float">
            <text:p>0,00</text:p>
          </table:table-cell>
          <table:table-cell table:style-name="Default" table:formula="of:=[.K38]/[.H38]" office:value-type="string" office:string-value="" calcext:value-type="error">
            <text:p>#DIV/0!</text:p>
          </table:table-cell>
          <table:table-cell table:formula="of:=SUM([.E38:.J38])" office:value-type="float" office:value="0" calcext:value-type="float">
            <text:p>0</text:p>
          </table:table-cell>
          <table:table-cell table:formula="of:=COUNTIFS([$'sanity-partial'.$C$1:$'sanity-partial'.$C$1048576];[.$A38];[$'sanity-partial'.$D$1:$'sanity-partial'.$D$1048576];[.$B38];[$'sanity-partial'.$E$1:$'sanity-partial'.$E$1048576];[.$C38];[$'sanity-partial'.$F$1:$'sanity-partial'.$F$1048576];[.$D38] )" office:value-type="float" office:value="0" calcext:value-type="float">
            <text:p>0</text:p>
          </table:table-cell>
          <table:table-cell table:style-name="ce69" table:formula="of:=[.M38]=[.N38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38];[$'DC-Q(DC)'.$C$1:$'DC-Q(DC)'.$C$1048576];[.$R38];[$'DC-Q(DC)'.$D$1:$'DC-Q(DC)'.$D$1048576];[.$S38];[$'DC-Q(DC)'.$E$1:$'DC-Q(DC)'.$E$1048576];[.$T38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;[$'DC-Q(DC)'.$M$1:$'DC-Q(DC)'.$M$1048576];&quot;NS&quot;)+COUNTIFS([$'DC-Q(DC)'.$B$1:$'DC-Q(DC)'.$B$1048576];[.$Q38];[$'DC-Q(DC)'.$C$1:$'DC-Q(DC)'.$C$1048576];[.$R38];[$'DC-Q(DC)'.$D$1:$'DC-Q(DC)'.$D$1048576];[.$S38];[$'DC-Q(DC)'.$E$1:$'DC-Q(DC)'.$E$1048576];[.$T38];[$'DC-Q(DC)'.$M$1:$'DC-Q(DC)'.$M$1048576];&quot;NS1&quot;)+COUNTIFS([$'DC-Q(DC)'.$B$1:$'DC-Q(DC)'.$B$1048576];[.$Q38];[$'DC-Q(DC)'.$C$1:$'DC-Q(DC)'.$C$1048576];[.$R38];[$'DC-Q(DC)'.$D$1:$'DC-Q(DC)'.$D$1048576];[.$S38];[$'DC-Q(DC)'.$E$1:$'DC-Q(DC)'.$E$1048576];[.$T38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38];[$'DC-Q(DC)'.$C$1:$'DC-Q(DC)'.$C$1048576];[.$R38];[$'DC-Q(DC)'.$D$1:$'DC-Q(DC)'.$D$1048576];[.$S38];[$'DC-Q(DC)'.$E$1:$'DC-Q(DC)'.$E$1048576];[.$T38])" office:value-type="float" office:value="0" calcext:value-type="float">
            <text:p>0</text:p>
          </table:table-cell>
          <table:table-cell table:formula="of:=[.AA38]/[.U38]" office:value-type="string" office:string-value="" calcext:value-type="error">
            <text:p>#DIV/0!</text:p>
          </table:table-cell>
          <table:table-cell table:formula="of:=SUM([.U38:.Z38])" office:value-type="float" office:value="0" calcext:value-type="float">
            <text:p>0</text:p>
          </table:table-cell>
          <table:table-cell table:formula="of:=COUNTIFS([$'DC-Q(DC)'.$B$1:$'DC-Q(DC)'.$B$1048576];[.$Q38];[$'DC-Q(DC)'.$C$1:$'DC-Q(DC)'.$C$1048576];[.$R38];[$'DC-Q(DC)'.$D$1:$'DC-Q(DC)'.$D$1048576];[.$S38];[$'DC-Q(DC)'.$E$1:$'DC-Q(DC)'.$E$1048576];[.$T38])" office:value-type="float" office:value="0" calcext:value-type="float">
            <text:p>0</text:p>
          </table:table-cell>
          <table:table-cell table:style-name="ce69" table:formula="of:=[.AC38]=[.AD38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39];[$'DC-Q(DC)'.$C$1:$'DC-Q(DC)'.$C$1048576];[.$R39];[$'DC-Q(DC)'.$D$1:$'DC-Q(DC)'.$D$1048576];[.$S39];[$'DC-Q(DC)'.$E$1:$'DC-Q(DC)'.$E$1048576];[.$T39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;[$'DC-Q(DC)'.$M$1:$'DC-Q(DC)'.$M$1048576];&quot;NS&quot;)+COUNTIFS([$'DC-Q(DC)'.$B$1:$'DC-Q(DC)'.$B$1048576];[.$Q39];[$'DC-Q(DC)'.$C$1:$'DC-Q(DC)'.$C$1048576];[.$R39];[$'DC-Q(DC)'.$D$1:$'DC-Q(DC)'.$D$1048576];[.$S39];[$'DC-Q(DC)'.$E$1:$'DC-Q(DC)'.$E$1048576];[.$T39];[$'DC-Q(DC)'.$M$1:$'DC-Q(DC)'.$M$1048576];&quot;NS1&quot;)+COUNTIFS([$'DC-Q(DC)'.$B$1:$'DC-Q(DC)'.$B$1048576];[.$Q39];[$'DC-Q(DC)'.$C$1:$'DC-Q(DC)'.$C$1048576];[.$R39];[$'DC-Q(DC)'.$D$1:$'DC-Q(DC)'.$D$1048576];[.$S39];[$'DC-Q(DC)'.$E$1:$'DC-Q(DC)'.$E$1048576];[.$T39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39];[$'DC-Q(DC)'.$C$1:$'DC-Q(DC)'.$C$1048576];[.$R39];[$'DC-Q(DC)'.$D$1:$'DC-Q(DC)'.$D$1048576];[.$S39];[$'DC-Q(DC)'.$E$1:$'DC-Q(DC)'.$E$1048576];[.$T39])" office:value-type="float" office:value="0" calcext:value-type="float">
            <text:p>0</text:p>
          </table:table-cell>
          <table:table-cell table:formula="of:=[.AA39]/[.U39]" office:value-type="string" office:string-value="" calcext:value-type="error">
            <text:p>#DIV/0!</text:p>
          </table:table-cell>
          <table:table-cell table:formula="of:=SUM([.U39:.Z39])" office:value-type="float" office:value="0" calcext:value-type="float">
            <text:p>0</text:p>
          </table:table-cell>
          <table:table-cell table:formula="of:=COUNTIFS([$'DC-Q(DC)'.$B$1:$'DC-Q(DC)'.$B$1048576];[.$Q39];[$'DC-Q(DC)'.$C$1:$'DC-Q(DC)'.$C$1048576];[.$R39];[$'DC-Q(DC)'.$D$1:$'DC-Q(DC)'.$D$1048576];[.$S39];[$'DC-Q(DC)'.$E$1:$'DC-Q(DC)'.$E$1048576];[.$T39])" office:value-type="float" office:value="0" calcext:value-type="float">
            <text:p>0</text:p>
          </table:table-cell>
          <table:table-cell table:style-name="ce69" table:formula="of:=[.AC39]=[.AD39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0];[$'DC-Q(DC)'.$C$1:$'DC-Q(DC)'.$C$1048576];[.$R40];[$'DC-Q(DC)'.$D$1:$'DC-Q(DC)'.$D$1048576];[.$S40];[$'DC-Q(DC)'.$E$1:$'DC-Q(DC)'.$E$1048576];[.$T40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;[$'DC-Q(DC)'.$M$1:$'DC-Q(DC)'.$M$1048576];&quot;NS&quot;)+COUNTIFS([$'DC-Q(DC)'.$B$1:$'DC-Q(DC)'.$B$1048576];[.$Q40];[$'DC-Q(DC)'.$C$1:$'DC-Q(DC)'.$C$1048576];[.$R40];[$'DC-Q(DC)'.$D$1:$'DC-Q(DC)'.$D$1048576];[.$S40];[$'DC-Q(DC)'.$E$1:$'DC-Q(DC)'.$E$1048576];[.$T40];[$'DC-Q(DC)'.$M$1:$'DC-Q(DC)'.$M$1048576];&quot;NS1&quot;)+COUNTIFS([$'DC-Q(DC)'.$B$1:$'DC-Q(DC)'.$B$1048576];[.$Q40];[$'DC-Q(DC)'.$C$1:$'DC-Q(DC)'.$C$1048576];[.$R40];[$'DC-Q(DC)'.$D$1:$'DC-Q(DC)'.$D$1048576];[.$S40];[$'DC-Q(DC)'.$E$1:$'DC-Q(DC)'.$E$1048576];[.$T40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0];[$'DC-Q(DC)'.$C$1:$'DC-Q(DC)'.$C$1048576];[.$R40];[$'DC-Q(DC)'.$D$1:$'DC-Q(DC)'.$D$1048576];[.$S40];[$'DC-Q(DC)'.$E$1:$'DC-Q(DC)'.$E$1048576];[.$T40])" office:value-type="float" office:value="0" calcext:value-type="float">
            <text:p>0</text:p>
          </table:table-cell>
          <table:table-cell table:formula="of:=[.AA40]/[.U40]" office:value-type="string" office:string-value="" calcext:value-type="error">
            <text:p>#DIV/0!</text:p>
          </table:table-cell>
          <table:table-cell table:formula="of:=SUM([.U40:.Z40])" office:value-type="float" office:value="0" calcext:value-type="float">
            <text:p>0</text:p>
          </table:table-cell>
          <table:table-cell table:formula="of:=COUNTIFS([$'DC-Q(DC)'.$B$1:$'DC-Q(DC)'.$B$1048576];[.$Q40];[$'DC-Q(DC)'.$C$1:$'DC-Q(DC)'.$C$1048576];[.$R40];[$'DC-Q(DC)'.$D$1:$'DC-Q(DC)'.$D$1048576];[.$S40];[$'DC-Q(DC)'.$E$1:$'DC-Q(DC)'.$E$1048576];[.$T40])" office:value-type="float" office:value="0" calcext:value-type="float">
            <text:p>0</text:p>
          </table:table-cell>
          <table:table-cell table:style-name="ce69" table:formula="of:=[.AC40]=[.AD40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5" table:number-rows-spanned="3">
            <text:p>Totals Sanity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11"/>
          <table:table-cell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1];[$'DC-Q(DC)'.$C$1:$'DC-Q(DC)'.$C$1048576];[.$R41];[$'DC-Q(DC)'.$D$1:$'DC-Q(DC)'.$D$1048576];[.$S41];[$'DC-Q(DC)'.$E$1:$'DC-Q(DC)'.$E$1048576];[.$T41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;[$'DC-Q(DC)'.$M$1:$'DC-Q(DC)'.$M$1048576];&quot;NS&quot;)+COUNTIFS([$'DC-Q(DC)'.$B$1:$'DC-Q(DC)'.$B$1048576];[.$Q41];[$'DC-Q(DC)'.$C$1:$'DC-Q(DC)'.$C$1048576];[.$R41];[$'DC-Q(DC)'.$D$1:$'DC-Q(DC)'.$D$1048576];[.$S41];[$'DC-Q(DC)'.$E$1:$'DC-Q(DC)'.$E$1048576];[.$T41];[$'DC-Q(DC)'.$M$1:$'DC-Q(DC)'.$M$1048576];&quot;NS1&quot;)+COUNTIFS([$'DC-Q(DC)'.$B$1:$'DC-Q(DC)'.$B$1048576];[.$Q41];[$'DC-Q(DC)'.$C$1:$'DC-Q(DC)'.$C$1048576];[.$R41];[$'DC-Q(DC)'.$D$1:$'DC-Q(DC)'.$D$1048576];[.$S41];[$'DC-Q(DC)'.$E$1:$'DC-Q(DC)'.$E$1048576];[.$T41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1];[$'DC-Q(DC)'.$C$1:$'DC-Q(DC)'.$C$1048576];[.$R41];[$'DC-Q(DC)'.$D$1:$'DC-Q(DC)'.$D$1048576];[.$S41];[$'DC-Q(DC)'.$E$1:$'DC-Q(DC)'.$E$1048576];[.$T41])" office:value-type="float" office:value="0" calcext:value-type="float">
            <text:p>0</text:p>
          </table:table-cell>
          <table:table-cell table:formula="of:=[.AA41]/[.U41]" office:value-type="string" office:string-value="" calcext:value-type="error">
            <text:p>#DIV/0!</text:p>
          </table:table-cell>
          <table:table-cell table:formula="of:=SUM([.U41:.Z41])" office:value-type="float" office:value="0" calcext:value-type="float">
            <text:p>0</text:p>
          </table:table-cell>
          <table:table-cell table:formula="of:=COUNTIFS([$'DC-Q(DC)'.$B$1:$'DC-Q(DC)'.$B$1048576];[.$Q41];[$'DC-Q(DC)'.$C$1:$'DC-Q(DC)'.$C$1048576];[.$R41];[$'DC-Q(DC)'.$D$1:$'DC-Q(DC)'.$D$1048576];[.$S41];[$'DC-Q(DC)'.$E$1:$'DC-Q(DC)'.$E$1048576];[.$T41])" office:value-type="float" office:value="0" calcext:value-type="float">
            <text:p>0</text:p>
          </table:table-cell>
          <table:table-cell table:style-name="ce69" table:formula="of:=[.AC41]=[.AD41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number-columns-repeated="2" table:style-name="ce16"/>
          <table:table-cell/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2];[$'DC-Q(DC)'.$C$1:$'DC-Q(DC)'.$C$1048576];[.$R42];[$'DC-Q(DC)'.$D$1:$'DC-Q(DC)'.$D$1048576];[.$S42];[$'DC-Q(DC)'.$E$1:$'DC-Q(DC)'.$E$1048576];[.$T42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;[$'DC-Q(DC)'.$M$1:$'DC-Q(DC)'.$M$1048576];&quot;NS&quot;)+COUNTIFS([$'DC-Q(DC)'.$B$1:$'DC-Q(DC)'.$B$1048576];[.$Q42];[$'DC-Q(DC)'.$C$1:$'DC-Q(DC)'.$C$1048576];[.$R42];[$'DC-Q(DC)'.$D$1:$'DC-Q(DC)'.$D$1048576];[.$S42];[$'DC-Q(DC)'.$E$1:$'DC-Q(DC)'.$E$1048576];[.$T42];[$'DC-Q(DC)'.$M$1:$'DC-Q(DC)'.$M$1048576];&quot;NS1&quot;)+COUNTIFS([$'DC-Q(DC)'.$B$1:$'DC-Q(DC)'.$B$1048576];[.$Q42];[$'DC-Q(DC)'.$C$1:$'DC-Q(DC)'.$C$1048576];[.$R42];[$'DC-Q(DC)'.$D$1:$'DC-Q(DC)'.$D$1048576];[.$S42];[$'DC-Q(DC)'.$E$1:$'DC-Q(DC)'.$E$1048576];[.$T42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2];[$'DC-Q(DC)'.$C$1:$'DC-Q(DC)'.$C$1048576];[.$R42];[$'DC-Q(DC)'.$D$1:$'DC-Q(DC)'.$D$1048576];[.$S42];[$'DC-Q(DC)'.$E$1:$'DC-Q(DC)'.$E$1048576];[.$T42])" office:value-type="float" office:value="0" calcext:value-type="float">
            <text:p>0</text:p>
          </table:table-cell>
          <table:table-cell table:formula="of:=[.AA42]/[.U42]" office:value-type="string" office:string-value="" calcext:value-type="error">
            <text:p>#DIV/0!</text:p>
          </table:table-cell>
          <table:table-cell table:formula="of:=SUM([.U42:.Z42])" office:value-type="float" office:value="0" calcext:value-type="float">
            <text:p>0</text:p>
          </table:table-cell>
          <table:table-cell table:formula="of:=COUNTIFS([$'DC-Q(DC)'.$B$1:$'DC-Q(DC)'.$B$1048576];[.$Q42];[$'DC-Q(DC)'.$C$1:$'DC-Q(DC)'.$C$1048576];[.$R42];[$'DC-Q(DC)'.$D$1:$'DC-Q(DC)'.$D$1048576];[.$S42];[$'DC-Q(DC)'.$E$1:$'DC-Q(DC)'.$E$1048576];[.$T42])" office:value-type="float" office:value="0" calcext:value-type="float">
            <text:p>0</text:p>
          </table:table-cell>
          <table:table-cell table:style-name="ce69" table:formula="of:=[.AC42]=[.AD42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number-columns-repeated="2" table:style-name="ce16"/>
          <table:table-cell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OE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3];[$'DC-Q(DC)'.$C$1:$'DC-Q(DC)'.$C$1048576];[.$R43];[$'DC-Q(DC)'.$D$1:$'DC-Q(DC)'.$D$1048576];[.$S43];[$'DC-Q(DC)'.$E$1:$'DC-Q(DC)'.$E$1048576];[.$T43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;[$'DC-Q(DC)'.$M$1:$'DC-Q(DC)'.$M$1048576];&quot;NS&quot;)+COUNTIFS([$'DC-Q(DC)'.$B$1:$'DC-Q(DC)'.$B$1048576];[.$Q43];[$'DC-Q(DC)'.$C$1:$'DC-Q(DC)'.$C$1048576];[.$R43];[$'DC-Q(DC)'.$D$1:$'DC-Q(DC)'.$D$1048576];[.$S43];[$'DC-Q(DC)'.$E$1:$'DC-Q(DC)'.$E$1048576];[.$T43];[$'DC-Q(DC)'.$M$1:$'DC-Q(DC)'.$M$1048576];&quot;NS1&quot;)+COUNTIFS([$'DC-Q(DC)'.$B$1:$'DC-Q(DC)'.$B$1048576];[.$Q43];[$'DC-Q(DC)'.$C$1:$'DC-Q(DC)'.$C$1048576];[.$R43];[$'DC-Q(DC)'.$D$1:$'DC-Q(DC)'.$D$1048576];[.$S43];[$'DC-Q(DC)'.$E$1:$'DC-Q(DC)'.$E$1048576];[.$T43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3];[$'DC-Q(DC)'.$C$1:$'DC-Q(DC)'.$C$1048576];[.$R43];[$'DC-Q(DC)'.$D$1:$'DC-Q(DC)'.$D$1048576];[.$S43];[$'DC-Q(DC)'.$E$1:$'DC-Q(DC)'.$E$1048576];[.$T43])" office:value-type="float" office:value="0" calcext:value-type="float">
            <text:p>0</text:p>
          </table:table-cell>
          <table:table-cell table:formula="of:=[.AA43]/[.U43]" office:value-type="string" office:string-value="" calcext:value-type="error">
            <text:p>#DIV/0!</text:p>
          </table:table-cell>
          <table:table-cell table:formula="of:=SUM([.U43:.Z43])" office:value-type="float" office:value="0" calcext:value-type="float">
            <text:p>0</text:p>
          </table:table-cell>
          <table:table-cell table:formula="of:=COUNTIFS([$'DC-Q(DC)'.$B$1:$'DC-Q(DC)'.$B$1048576];[.$Q43];[$'DC-Q(DC)'.$C$1:$'DC-Q(DC)'.$C$1048576];[.$R43];[$'DC-Q(DC)'.$D$1:$'DC-Q(DC)'.$D$1048576];[.$S43];[$'DC-Q(DC)'.$E$1:$'DC-Q(DC)'.$E$1048576];[.$T43])" office:value-type="float" office:value="0" calcext:value-type="float">
            <text:p>0</text:p>
          </table:table-cell>
          <table:table-cell table:style-name="ce69" table:formula="of:=[.AC43]=[.AD43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Tool</text:p>
          </table:table-cell>
          <table:table-cell table:style-name="ce48" office:value-type="string" calcext:value-type="string">
            <text:p>Version</text:p>
          </table:table-cell>
          <table:table-cell table:style-name="ce43" office:value-type="string" calcext:value-type="string">
            <text:p>Lift</text:p>
          </table:table-cell>
          <table:table-cell table:style-name="ce43" office:value-type="string" calcext:value-type="string">
            <text:p>Opt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25" office:value-type="string" calcext:value-type="string">
            <text:p>Err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61" office:value-type="string" calcext:value-type="string">
            <text:p>TT</text:p>
          </table:table-cell>
          <table:table-cell table:style-name="ce64" office:value-type="string" calcext:value-type="string">
            <text:p>AT</text:p>
          </table:table-cell>
          <table:table-cell table:style-name="ce65" office:value-type="string" calcext:value-type="string">
            <text:p>Greet</text:p>
          </table:table-cell>
          <table:table-cell table:style-name="ce65" office:value-type="string" calcext:value-type="string">
            <text:p>Expect</text:p>
          </table:table-cell>
          <table:table-cell table:style-name="ce65" office:value-type="string" calcext:value-type="string">
            <text:p>Check</text:p>
          </table:table-cell>
          <table:table-cell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DM,NoOE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4];[$'DC-Q(DC)'.$C$1:$'DC-Q(DC)'.$C$1048576];[.$R44];[$'DC-Q(DC)'.$D$1:$'DC-Q(DC)'.$D$1048576];[.$S44];[$'DC-Q(DC)'.$E$1:$'DC-Q(DC)'.$E$1048576];[.$T44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;[$'DC-Q(DC)'.$M$1:$'DC-Q(DC)'.$M$1048576];&quot;NS&quot;)+COUNTIFS([$'DC-Q(DC)'.$B$1:$'DC-Q(DC)'.$B$1048576];[.$Q44];[$'DC-Q(DC)'.$C$1:$'DC-Q(DC)'.$C$1048576];[.$R44];[$'DC-Q(DC)'.$D$1:$'DC-Q(DC)'.$D$1048576];[.$S44];[$'DC-Q(DC)'.$E$1:$'DC-Q(DC)'.$E$1048576];[.$T44];[$'DC-Q(DC)'.$M$1:$'DC-Q(DC)'.$M$1048576];&quot;NS1&quot;)+COUNTIFS([$'DC-Q(DC)'.$B$1:$'DC-Q(DC)'.$B$1048576];[.$Q44];[$'DC-Q(DC)'.$C$1:$'DC-Q(DC)'.$C$1048576];[.$R44];[$'DC-Q(DC)'.$D$1:$'DC-Q(DC)'.$D$1048576];[.$S44];[$'DC-Q(DC)'.$E$1:$'DC-Q(DC)'.$E$1048576];[.$T44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4];[$'DC-Q(DC)'.$C$1:$'DC-Q(DC)'.$C$1048576];[.$R44];[$'DC-Q(DC)'.$D$1:$'DC-Q(DC)'.$D$1048576];[.$S44];[$'DC-Q(DC)'.$E$1:$'DC-Q(DC)'.$E$1048576];[.$T44])" office:value-type="float" office:value="0" calcext:value-type="float">
            <text:p>0</text:p>
          </table:table-cell>
          <table:table-cell table:formula="of:=[.AA44]/[.U44]" office:value-type="string" office:string-value="" calcext:value-type="error">
            <text:p>#DIV/0!</text:p>
          </table:table-cell>
          <table:table-cell table:formula="of:=SUM([.U44:.Z44])" office:value-type="float" office:value="0" calcext:value-type="float">
            <text:p>0</text:p>
          </table:table-cell>
          <table:table-cell table:formula="of:=COUNTIFS([$'DC-Q(DC)'.$B$1:$'DC-Q(DC)'.$B$1048576];[.$Q44];[$'DC-Q(DC)'.$C$1:$'DC-Q(DC)'.$C$1048576];[.$R44];[$'DC-Q(DC)'.$D$1:$'DC-Q(DC)'.$D$1048576];[.$S44];[$'DC-Q(DC)'.$E$1:$'DC-Q(DC)'.$E$1048576];[.$T44])" office:value-type="float" office:value="0" calcext:value-type="float">
            <text:p>0</text:p>
          </table:table-cell>
          <table:table-cell table:style-name="ce69" table:formula="of:=[.AC44]=[.AD44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E20]" office:value-type="float" office:value="0" calcext:value-type="float">
            <text:p>0</text:p>
          </table:table-cell>
          <table:table-cell table:style-name="ce55" table:formula="of:=[.F20]" office:value-type="float" office:value="0" calcext:value-type="float">
            <text:p>0</text:p>
          </table:table-cell>
          <table:table-cell table:style-name="ce55" table:formula="of:=[.G20]" office:value-type="float" office:value="0" calcext:value-type="float">
            <text:p>0</text:p>
          </table:table-cell>
          <table:table-cell table:style-name="ce27" table:formula="of:=[.H20]" office:value-type="float" office:value="0" calcext:value-type="float">
            <text:p>0</text:p>
          </table:table-cell>
          <table:table-cell table:style-name="ce55" table:formula="of:=[.I20]" office:value-type="float" office:value="0" calcext:value-type="float">
            <text:p>0</text:p>
          </table:table-cell>
          <table:table-cell table:style-name="ce55" table:formula="of:=[.J20]" office:value-type="float" office:value="0" calcext:value-type="float">
            <text:p>0</text:p>
          </table:table-cell>
          <table:table-cell table:style-name="ce62" table:formula="of:=[.K20]" office:value-type="float" office:value="0" calcext:value-type="float">
            <text:p>0,00</text:p>
          </table:table-cell>
          <table:table-cell table:style-name="ce55" table:formula="of:=[.L20]" office:value-type="string" office:string-value="" calcext:value-type="error">
            <text:p>#DIV/0!</text:p>
          </table:table-cell>
          <table:table-cell table:style-name="ce55" table:formula="of:=[.M20]" office:value-type="float" office:value="0" calcext:value-type="float">
            <text:p>0</text:p>
          </table:table-cell>
          <table:table-cell table:style-name="ce55" table:formula="of:=[.N20]" office:value-type="float" office:value="0" calcext:value-type="float">
            <text:p>0</text:p>
          </table:table-cell>
          <table:table-cell table:style-name="ce69" table:formula="of:=[.M45]=[.N45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5];[$'DC-Q(DC)'.$C$1:$'DC-Q(DC)'.$C$1048576];[.$R45];[$'DC-Q(DC)'.$D$1:$'DC-Q(DC)'.$D$1048576];[.$S45];[$'DC-Q(DC)'.$E$1:$'DC-Q(DC)'.$E$1048576];[.$T45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;[$'DC-Q(DC)'.$M$1:$'DC-Q(DC)'.$M$1048576];&quot;NS&quot;)+COUNTIFS([$'DC-Q(DC)'.$B$1:$'DC-Q(DC)'.$B$1048576];[.$Q45];[$'DC-Q(DC)'.$C$1:$'DC-Q(DC)'.$C$1048576];[.$R45];[$'DC-Q(DC)'.$D$1:$'DC-Q(DC)'.$D$1048576];[.$S45];[$'DC-Q(DC)'.$E$1:$'DC-Q(DC)'.$E$1048576];[.$T45];[$'DC-Q(DC)'.$M$1:$'DC-Q(DC)'.$M$1048576];&quot;NS1&quot;)+COUNTIFS([$'DC-Q(DC)'.$B$1:$'DC-Q(DC)'.$B$1048576];[.$Q45];[$'DC-Q(DC)'.$C$1:$'DC-Q(DC)'.$C$1048576];[.$R45];[$'DC-Q(DC)'.$D$1:$'DC-Q(DC)'.$D$1048576];[.$S45];[$'DC-Q(DC)'.$E$1:$'DC-Q(DC)'.$E$1048576];[.$T45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5];[$'DC-Q(DC)'.$C$1:$'DC-Q(DC)'.$C$1048576];[.$R45];[$'DC-Q(DC)'.$D$1:$'DC-Q(DC)'.$D$1048576];[.$S45];[$'DC-Q(DC)'.$E$1:$'DC-Q(DC)'.$E$1048576];[.$T45])" office:value-type="float" office:value="0" calcext:value-type="float">
            <text:p>0</text:p>
          </table:table-cell>
          <table:table-cell table:formula="of:=[.AA45]/[.U45]" office:value-type="string" office:string-value="" calcext:value-type="error">
            <text:p>#DIV/0!</text:p>
          </table:table-cell>
          <table:table-cell table:formula="of:=SUM([.U45:.Z45])" office:value-type="float" office:value="0" calcext:value-type="float">
            <text:p>0</text:p>
          </table:table-cell>
          <table:table-cell table:formula="of:=COUNTIFS([$'DC-Q(DC)'.$B$1:$'DC-Q(DC)'.$B$1048576];[.$Q45];[$'DC-Q(DC)'.$C$1:$'DC-Q(DC)'.$C$1048576];[.$R45];[$'DC-Q(DC)'.$D$1:$'DC-Q(DC)'.$D$1048576];[.$S45];[$'DC-Q(DC)'.$E$1:$'DC-Q(DC)'.$E$1048576];[.$T45])" office:value-type="float" office:value="0" calcext:value-type="float">
            <text:p>0</text:p>
          </table:table-cell>
          <table:table-cell table:style-name="ce69" table:formula="of:=[.AC45]=[.AD45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E7]" office:value-type="float" office:value="0" calcext:value-type="float">
            <text:p>0</text:p>
          </table:table-cell>
          <table:table-cell table:style-name="ce55" table:formula="of:=[.F7]" office:value-type="float" office:value="0" calcext:value-type="float">
            <text:p>0</text:p>
          </table:table-cell>
          <table:table-cell table:style-name="ce55" table:formula="of:=[.G7]" office:value-type="float" office:value="0" calcext:value-type="float">
            <text:p>0</text:p>
          </table:table-cell>
          <table:table-cell table:style-name="ce27" table:formula="of:=[.H7]" office:value-type="float" office:value="0" calcext:value-type="float">
            <text:p>0</text:p>
          </table:table-cell>
          <table:table-cell table:style-name="ce55" table:formula="of:=[.I7]" office:value-type="float" office:value="0" calcext:value-type="float">
            <text:p>0</text:p>
          </table:table-cell>
          <table:table-cell table:style-name="ce55" table:formula="of:=[.J7]" office:value-type="float" office:value="0" calcext:value-type="float">
            <text:p>0</text:p>
          </table:table-cell>
          <table:table-cell table:style-name="ce62" table:formula="of:=[.K7]" office:value-type="float" office:value="0" calcext:value-type="float">
            <text:p>0,00</text:p>
          </table:table-cell>
          <table:table-cell table:style-name="ce55" table:formula="of:=[.L7]" office:value-type="string" office:string-value="" calcext:value-type="error">
            <text:p>#DIV/0!</text:p>
          </table:table-cell>
          <table:table-cell table:style-name="ce55" table:formula="of:=[.M7]" office:value-type="float" office:value="0" calcext:value-type="float">
            <text:p>0</text:p>
          </table:table-cell>
          <table:table-cell table:style-name="ce55" table:formula="of:=[.N7]" office:value-type="float" office:value="0" calcext:value-type="float">
            <text:p>0</text:p>
          </table:table-cell>
          <table:table-cell table:style-name="ce69" table:formula="of:=[.M46]=[.N46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;[$'DC-Q(DC)'.$M$1:$'DC-Q(DC)'.$M$1048576];&quot;&gt;=0&quot;)" office:value-type="float" office:value="0" calcext:value-type="float">
            <text:p>0</text:p>
          </table:table-cell>
          <table:table-cell table:style-name="ce52" table:formula="of:=COUNTIFS([$'DC-Q(DC)'.$B$1:$'DC-Q(DC)'.$B$1048576];[.$Q46];[$'DC-Q(DC)'.$C$1:$'DC-Q(DC)'.$C$1048576];[.$R46];[$'DC-Q(DC)'.$D$1:$'DC-Q(DC)'.$D$1048576];[.$S46];[$'DC-Q(DC)'.$E$1:$'DC-Q(DC)'.$E$1048576];[.$T46];[$'DC-Q(DC)'.$M$1:$'DC-Q(DC)'.$M$1048576];[.V$6])" office:value-type="float" office:value="0" calcext:value-type="float">
            <text:p>0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;[$'DC-Q(DC)'.$M$1:$'DC-Q(DC)'.$M$1048576];[.W$6])" office:value-type="float" office:value="0" calcext:value-type="float">
            <text:p>0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;[$'DC-Q(DC)'.$M$1:$'DC-Q(DC)'.$M$1048576];&quot;NS&quot;)+COUNTIFS([$'DC-Q(DC)'.$B$1:$'DC-Q(DC)'.$B$1048576];[.$Q46];[$'DC-Q(DC)'.$C$1:$'DC-Q(DC)'.$C$1048576];[.$R46];[$'DC-Q(DC)'.$D$1:$'DC-Q(DC)'.$D$1048576];[.$S46];[$'DC-Q(DC)'.$E$1:$'DC-Q(DC)'.$E$1048576];[.$T46];[$'DC-Q(DC)'.$M$1:$'DC-Q(DC)'.$M$1048576];&quot;NS1&quot;)+COUNTIFS([$'DC-Q(DC)'.$B$1:$'DC-Q(DC)'.$B$1048576];[.$Q46];[$'DC-Q(DC)'.$C$1:$'DC-Q(DC)'.$C$1048576];[.$R46];[$'DC-Q(DC)'.$D$1:$'DC-Q(DC)'.$D$1048576];[.$S46];[$'DC-Q(DC)'.$E$1:$'DC-Q(DC)'.$E$1048576];[.$T46];[$'DC-Q(DC)'.$M$1:$'DC-Q(DC)'.$M$1048576];&quot;NS2&quot;)" office:value-type="float" office:value="0" calcext:value-type="float">
            <text:p>0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;[$'DC-Q(DC)'.$M$1:$'DC-Q(DC)'.$M$1048576];[.Y$6])" office:value-type="float" office:value="0" calcext:value-type="float">
            <text:p>0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;[$'DC-Q(DC)'.$M$1:$'DC-Q(DC)'.$M$1048576];[.Z$6])" office:value-type="float" office:value="0" calcext:value-type="float">
            <text:p>0</text:p>
          </table:table-cell>
          <table:table-cell table:formula="of:=SUMIFS([$'DC-Q(DC)'.$M$1:$'DC-Q(DC)'.$M$1048576];[$'DC-Q(DC)'.$B$1:$'DC-Q(DC)'.$B$1048576];[.$Q46];[$'DC-Q(DC)'.$C$1:$'DC-Q(DC)'.$C$1048576];[.$R46];[$'DC-Q(DC)'.$D$1:$'DC-Q(DC)'.$D$1048576];[.$S46];[$'DC-Q(DC)'.$E$1:$'DC-Q(DC)'.$E$1048576];[.$T46])" office:value-type="float" office:value="0" calcext:value-type="float">
            <text:p>0</text:p>
          </table:table-cell>
          <table:table-cell table:formula="of:=[.AA46]/[.U46]" office:value-type="string" office:string-value="" calcext:value-type="error">
            <text:p>#DIV/0!</text:p>
          </table:table-cell>
          <table:table-cell table:formula="of:=SUM([.U46:.Z46])" office:value-type="float" office:value="0" calcext:value-type="float">
            <text:p>0</text:p>
          </table:table-cell>
          <table:table-cell table:formula="of:=COUNTIFS([$'DC-Q(DC)'.$B$1:$'DC-Q(DC)'.$B$1048576];[.$Q46];[$'DC-Q(DC)'.$C$1:$'DC-Q(DC)'.$C$1048576];[.$R46];[$'DC-Q(DC)'.$D$1:$'DC-Q(DC)'.$D$1048576];[.$S46];[$'DC-Q(DC)'.$E$1:$'DC-Q(DC)'.$E$1048576];[.$T46])" office:value-type="float" office:value="0" calcext:value-type="float">
            <text:p>0</text:p>
          </table:table-cell>
          <table:table-cell table:style-name="ce69" table:formula="of:=[.AC46]=[.AD46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21]" office:value-type="float" office:value="0" calcext:value-type="float">
            <text:p>0</text:p>
          </table:table-cell>
          <table:table-cell table:style-name="ce57" table:formula="of:=[.F21]" office:value-type="float" office:value="0" calcext:value-type="float">
            <text:p>0</text:p>
          </table:table-cell>
          <table:table-cell table:style-name="ce57" table:formula="of:=[.G21]" office:value-type="float" office:value="0" calcext:value-type="float">
            <text:p>0</text:p>
          </table:table-cell>
          <table:table-cell table:style-name="ce28" table:formula="of:=[.H21]" office:value-type="float" office:value="0" calcext:value-type="float">
            <text:p>0</text:p>
          </table:table-cell>
          <table:table-cell table:style-name="ce57" table:formula="of:=[.I21]" office:value-type="float" office:value="0" calcext:value-type="float">
            <text:p>0</text:p>
          </table:table-cell>
          <table:table-cell table:style-name="ce57" table:formula="of:=[.J21]" office:value-type="float" office:value="0" calcext:value-type="float">
            <text:p>0</text:p>
          </table:table-cell>
          <table:table-cell table:style-name="ce63" table:formula="of:=[.K21]" office:value-type="float" office:value="0" calcext:value-type="float">
            <text:p>0,00</text:p>
          </table:table-cell>
          <table:table-cell table:style-name="ce57" table:formula="of:=[.L21]" office:value-type="string" office:string-value="" calcext:value-type="error">
            <text:p>#DIV/0!</text:p>
          </table:table-cell>
          <table:table-cell table:style-name="ce57" table:formula="of:=[.M21]" office:value-type="float" office:value="0" calcext:value-type="float">
            <text:p>0</text:p>
          </table:table-cell>
          <table:table-cell table:style-name="ce57" table:formula="of:=[.N21]" office:value-type="float" office:value="0" calcext:value-type="float">
            <text:p>0</text:p>
          </table:table-cell>
          <table:table-cell table:style-name="ce69" table:formula="of:=[.M47]=[.N47]" office:value-type="boolean" office:boolean-value="true" calcext:value-type="boolean">
            <text:p>VRAI</text:p>
          </table:table-cell>
          <table:table-cell table:number-columns-repeated="21"/>
        </table:table-row>
        <table:table-row table:style-name="ro1"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E8]" office:value-type="float" office:value="0" calcext:value-type="float">
            <text:p>0</text:p>
          </table:table-cell>
          <table:table-cell table:style-name="ce55" table:formula="of:=[.F8]" office:value-type="float" office:value="0" calcext:value-type="float">
            <text:p>0</text:p>
          </table:table-cell>
          <table:table-cell table:style-name="ce55" table:formula="of:=[.G8]" office:value-type="float" office:value="0" calcext:value-type="float">
            <text:p>0</text:p>
          </table:table-cell>
          <table:table-cell table:style-name="ce27" table:formula="of:=[.H8]" office:value-type="float" office:value="0" calcext:value-type="float">
            <text:p>0</text:p>
          </table:table-cell>
          <table:table-cell table:style-name="ce55" table:formula="of:=[.I8]" office:value-type="float" office:value="0" calcext:value-type="float">
            <text:p>0</text:p>
          </table:table-cell>
          <table:table-cell table:style-name="ce55" table:formula="of:=[.J8]" office:value-type="float" office:value="0" calcext:value-type="float">
            <text:p>0</text:p>
          </table:table-cell>
          <table:table-cell table:style-name="ce62" table:formula="of:=[.K8]" office:value-type="float" office:value="0" calcext:value-type="float">
            <text:p>0,00</text:p>
          </table:table-cell>
          <table:table-cell table:style-name="ce55" table:formula="of:=[.L8]" office:value-type="string" office:string-value="" calcext:value-type="error">
            <text:p>#DIV/0!</text:p>
          </table:table-cell>
          <table:table-cell table:style-name="ce55" table:formula="of:=[.M8]" office:value-type="float" office:value="0" calcext:value-type="float">
            <text:p>0</text:p>
          </table:table-cell>
          <table:table-cell table:style-name="ce55" table:formula="of:=[.N8]" office:value-type="float" office:value="0" calcext:value-type="float">
            <text:p>0</text:p>
          </table:table-cell>
          <table:table-cell table:style-name="ce69" table:formula="of:=[.M48]=[.N48]" office:value-type="boolean" office:boolean-value="true" calcext:value-type="boolean">
            <text:p>VRAI</text:p>
          </table:table-cell>
          <table:table-cell table:number-columns-repeated="21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22]" office:value-type="float" office:value="0" calcext:value-type="float">
            <text:p>0</text:p>
          </table:table-cell>
          <table:table-cell table:style-name="ce57" table:formula="of:=[.F22]" office:value-type="float" office:value="0" calcext:value-type="float">
            <text:p>0</text:p>
          </table:table-cell>
          <table:table-cell table:style-name="ce57" table:formula="of:=[.G22]" office:value-type="float" office:value="0" calcext:value-type="float">
            <text:p>0</text:p>
          </table:table-cell>
          <table:table-cell table:style-name="ce28" table:formula="of:=[.H22]" office:value-type="float" office:value="0" calcext:value-type="float">
            <text:p>0</text:p>
          </table:table-cell>
          <table:table-cell table:style-name="ce57" table:formula="of:=[.I22]" office:value-type="float" office:value="0" calcext:value-type="float">
            <text:p>0</text:p>
          </table:table-cell>
          <table:table-cell table:style-name="ce57" table:formula="of:=[.J22]" office:value-type="float" office:value="0" calcext:value-type="float">
            <text:p>0</text:p>
          </table:table-cell>
          <table:table-cell table:style-name="ce63" table:formula="of:=[.K22]" office:value-type="float" office:value="0" calcext:value-type="float">
            <text:p>0,00</text:p>
          </table:table-cell>
          <table:table-cell table:style-name="ce57" table:formula="of:=[.L22]" office:value-type="string" office:string-value="" calcext:value-type="error">
            <text:p>#DIV/0!</text:p>
          </table:table-cell>
          <table:table-cell table:style-name="ce57" table:formula="of:=[.M22]" office:value-type="float" office:value="0" calcext:value-type="float">
            <text:p>0</text:p>
          </table:table-cell>
          <table:table-cell table:style-name="ce57" table:formula="of:=[.N22]" office:value-type="float" office:value="0" calcext:value-type="float">
            <text:p>0</text:p>
          </table:table-cell>
          <table:table-cell table:style-name="ce69" table:formula="of:=[.M49]=[.N49]" office:value-type="boolean" office:boolean-value="true" calcext:value-type="boolean">
            <text:p>VRAI</text:p>
          </table:table-cell>
          <table:table-cell/>
          <table:table-cell table:style-name="ce3" office:value-type="string" calcext:value-type="string" table:number-columns-spanned="15" table:number-rows-spanned="3">
            <text:p>O(DC)-Q(DC)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4"/>
          <table:table-cell table:number-columns-repeated="5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1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9]" office:value-type="float" office:value="0" calcext:value-type="float">
            <text:p>0</text:p>
          </table:table-cell>
          <table:table-cell table:style-name="ce57" table:formula="of:=[.F9]" office:value-type="float" office:value="0" calcext:value-type="float">
            <text:p>0</text:p>
          </table:table-cell>
          <table:table-cell table:style-name="ce57" table:formula="of:=[.G9]" office:value-type="float" office:value="0" calcext:value-type="float">
            <text:p>0</text:p>
          </table:table-cell>
          <table:table-cell table:style-name="ce28" table:formula="of:=[.H9]" office:value-type="float" office:value="0" calcext:value-type="float">
            <text:p>0</text:p>
          </table:table-cell>
          <table:table-cell table:style-name="ce57" table:formula="of:=[.I9]" office:value-type="float" office:value="0" calcext:value-type="float">
            <text:p>0</text:p>
          </table:table-cell>
          <table:table-cell table:style-name="ce57" table:formula="of:=[.J9]" office:value-type="float" office:value="0" calcext:value-type="float">
            <text:p>0</text:p>
          </table:table-cell>
          <table:table-cell table:style-name="ce63" table:formula="of:=[.K9]" office:value-type="float" office:value="0" calcext:value-type="float">
            <text:p>0,00</text:p>
          </table:table-cell>
          <table:table-cell table:style-name="ce57" table:formula="of:=[.L9]" office:value-type="string" office:string-value="" calcext:value-type="error">
            <text:p>#DIV/0!</text:p>
          </table:table-cell>
          <table:table-cell table:style-name="ce57" table:formula="of:=[.M9]" office:value-type="float" office:value="0" calcext:value-type="float">
            <text:p>0</text:p>
          </table:table-cell>
          <table:table-cell table:style-name="ce57" table:formula="of:=[.N9]" office:value-type="float" office:value="0" calcext:value-type="float">
            <text:p>0</text:p>
          </table:table-cell>
          <table:table-cell table:style-name="ce69" table:formula="of:=[.M50]=[.N50]" office:value-type="boolean" office:boolean-value="true" calcext:value-type="boolean">
            <text:p>VRAI</text:p>
          </table:table-cell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23]" office:value-type="float" office:value="0" calcext:value-type="float">
            <text:p>0</text:p>
          </table:table-cell>
          <table:table-cell table:style-name="ce57" table:formula="of:=[.F23]" office:value-type="float" office:value="0" calcext:value-type="float">
            <text:p>0</text:p>
          </table:table-cell>
          <table:table-cell table:style-name="ce57" table:formula="of:=[.G23]" office:value-type="float" office:value="0" calcext:value-type="float">
            <text:p>0</text:p>
          </table:table-cell>
          <table:table-cell table:style-name="ce28" table:formula="of:=[.H23]" office:value-type="float" office:value="0" calcext:value-type="float">
            <text:p>0</text:p>
          </table:table-cell>
          <table:table-cell table:style-name="ce57" table:formula="of:=[.I23]" office:value-type="float" office:value="0" calcext:value-type="float">
            <text:p>0</text:p>
          </table:table-cell>
          <table:table-cell table:style-name="ce57" table:formula="of:=[.J23]" office:value-type="float" office:value="0" calcext:value-type="float">
            <text:p>0</text:p>
          </table:table-cell>
          <table:table-cell table:style-name="ce63" table:formula="of:=[.K23]" office:value-type="float" office:value="0" calcext:value-type="float">
            <text:p>0,00</text:p>
          </table:table-cell>
          <table:table-cell table:style-name="ce57" table:formula="of:=[.L23]" office:value-type="string" office:string-value="" calcext:value-type="error">
            <text:p>#DIV/0!</text:p>
          </table:table-cell>
          <table:table-cell table:style-name="ce57" table:formula="of:=[.M23]" office:value-type="float" office:value="0" calcext:value-type="float">
            <text:p>0</text:p>
          </table:table-cell>
          <table:table-cell table:style-name="ce57" table:formula="of:=[.N23]" office:value-type="float" office:value="0" calcext:value-type="float">
            <text:p>0</text:p>
          </table:table-cell>
          <table:table-cell table:style-name="ce69" table:formula="of:=[.M51]=[.N51]" office:value-type="boolean" office:boolean-value="true" calcext:value-type="boolean">
            <text:p>VRAI</text:p>
          </table:table-cell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1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10]" office:value-type="float" office:value="0" calcext:value-type="float">
            <text:p>0</text:p>
          </table:table-cell>
          <table:table-cell table:style-name="ce57" table:formula="of:=[.F10]" office:value-type="float" office:value="0" calcext:value-type="float">
            <text:p>0</text:p>
          </table:table-cell>
          <table:table-cell table:style-name="ce57" table:formula="of:=[.G10]" office:value-type="float" office:value="0" calcext:value-type="float">
            <text:p>0</text:p>
          </table:table-cell>
          <table:table-cell table:style-name="ce28" table:formula="of:=[.H10]" office:value-type="float" office:value="0" calcext:value-type="float">
            <text:p>0</text:p>
          </table:table-cell>
          <table:table-cell table:style-name="ce57" table:formula="of:=[.I10]" office:value-type="float" office:value="0" calcext:value-type="float">
            <text:p>0</text:p>
          </table:table-cell>
          <table:table-cell table:style-name="ce57" table:formula="of:=[.J10]" office:value-type="float" office:value="0" calcext:value-type="float">
            <text:p>0</text:p>
          </table:table-cell>
          <table:table-cell table:style-name="ce63" table:formula="of:=[.K10]" office:value-type="float" office:value="0" calcext:value-type="float">
            <text:p>0,00</text:p>
          </table:table-cell>
          <table:table-cell table:style-name="ce57" table:formula="of:=[.L10]" office:value-type="string" office:string-value="" calcext:value-type="error">
            <text:p>#DIV/0!</text:p>
          </table:table-cell>
          <table:table-cell table:style-name="ce57" table:formula="of:=[.M10]" office:value-type="float" office:value="0" calcext:value-type="float">
            <text:p>0</text:p>
          </table:table-cell>
          <table:table-cell table:style-name="ce57" table:formula="of:=[.N10]" office:value-type="float" office:value="0" calcext:value-type="float">
            <text:p>0</text:p>
          </table:table-cell>
          <table:table-cell table:style-name="ce69" table:formula="of:=[.M52]=[.N52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5" office:value-type="string" calcext:value-type="string">
            <text:p>Greet</text:p>
          </table:table-cell>
          <table:table-cell table:style-name="ce8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24]" office:value-type="float" office:value="0" calcext:value-type="float">
            <text:p>0</text:p>
          </table:table-cell>
          <table:table-cell table:style-name="ce57" table:formula="of:=[.F24]" office:value-type="float" office:value="0" calcext:value-type="float">
            <text:p>0</text:p>
          </table:table-cell>
          <table:table-cell table:style-name="ce57" table:formula="of:=[.G24]" office:value-type="float" office:value="0" calcext:value-type="float">
            <text:p>0</text:p>
          </table:table-cell>
          <table:table-cell table:style-name="ce28" table:formula="of:=[.H24]" office:value-type="float" office:value="0" calcext:value-type="float">
            <text:p>0</text:p>
          </table:table-cell>
          <table:table-cell table:style-name="ce57" table:formula="of:=[.I24]" office:value-type="float" office:value="0" calcext:value-type="float">
            <text:p>0</text:p>
          </table:table-cell>
          <table:table-cell table:style-name="ce57" table:formula="of:=[.J24]" office:value-type="float" office:value="0" calcext:value-type="float">
            <text:p>0</text:p>
          </table:table-cell>
          <table:table-cell table:style-name="ce63" table:formula="of:=[.K24]" office:value-type="float" office:value="0" calcext:value-type="float">
            <text:p>0,00</text:p>
          </table:table-cell>
          <table:table-cell table:style-name="ce57" table:formula="of:=[.L24]" office:value-type="string" office:string-value="" calcext:value-type="error">
            <text:p>#DIV/0!</text:p>
          </table:table-cell>
          <table:table-cell table:style-name="ce57" table:formula="of:=[.M24]" office:value-type="float" office:value="0" calcext:value-type="float">
            <text:p>0</text:p>
          </table:table-cell>
          <table:table-cell table:style-name="ce57" table:formula="of:=[.N24]" office:value-type="float" office:value="0" calcext:value-type="float">
            <text:p>0</text:p>
          </table:table-cell>
          <table:table-cell table:style-name="ce69" table:formula="of:=[.M53]=[.N53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&quot;&gt;=0&quot;)" office:value-type="float" office:value="0" calcext:value-type="float">
            <text:p>0</text:p>
          </table:table-cell>
          <table:table-cell table:style-name="ce52"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[.V$6])" office:value-type="float" office:value="0" calcext:value-type="float">
            <text:p>0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[.W$6])" office:value-type="float" office:value="0" calcext:value-type="float">
            <text:p>0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&quot;NS&quot;)+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&quot;NS1&quot;)+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&quot;NS2&quot;)" office:value-type="float" office:value="0" calcext:value-type="float">
            <text:p>0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[.Y$6])" office:value-type="float" office:value="0" calcext:value-type="float">
            <text:p>0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;[$'O(DC)-Q(DC)'.$M$1:$'O(DC)-Q(DC)'.$M$1048576];[.Z$6])" office:value-type="float" office:value="0" calcext:value-type="float">
            <text:p>0</text:p>
          </table:table-cell>
          <table:table-cell table:formula="of:=SUMIFS([$'O(DC)-Q(DC)'.$M$1:$'O(DC)-Q(DC)'.$M$1048576];[$'O(DC)-Q(DC)'.$B$1:$'O(DC)-Q(DC)'.$B$1048576];[.$Q53];[$'O(DC)-Q(DC)'.$C$1:$'O(DC)-Q(DC)'.$C$1048576];[.$R53];[$'O(DC)-Q(DC)'.$D$1:$'O(DC)-Q(DC)'.$D$1048576];[.$S53];[$'O(DC)-Q(DC)'.$E$1:$'O(DC)-Q(DC)'.$E$1048576];[.$T53])" office:value-type="float" office:value="0" calcext:value-type="float">
            <text:p>0</text:p>
          </table:table-cell>
          <table:table-cell table:formula="of:=[.AA53]/[.U53]" office:value-type="string" office:string-value="" calcext:value-type="error">
            <text:p>#DIV/0!</text:p>
          </table:table-cell>
          <table:table-cell table:formula="of:=SUM([.U53:.Z53])" office:value-type="float" office:value="0" calcext:value-type="float">
            <text:p>0</text:p>
          </table:table-cell>
          <table:table-cell table:formula="of:=COUNTIFS([$'O(DC)-Q(DC)'.$B$1:$'O(DC)-Q(DC)'.$B$1048576];[.$Q53];[$'O(DC)-Q(DC)'.$C$1:$'O(DC)-Q(DC)'.$C$1048576];[.$R53];[$'O(DC)-Q(DC)'.$D$1:$'O(DC)-Q(DC)'.$D$1048576];[.$S53];[$'O(DC)-Q(DC)'.$E$1:$'O(DC)-Q(DC)'.$E$1048576];[.$T53])" office:value-type="float" office:value="0" calcext:value-type="float">
            <text:p>0</text:p>
          </table:table-cell>
          <table:table-cell table:style-name="ce69" table:formula="of:=[.AC53]=[.AD53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ne</text:p>
          </table:table-cell>
          <table:table-cell table:style-name="ce57" table:formula="of:=[.E11]" office:value-type="float" office:value="0" calcext:value-type="float">
            <text:p>0</text:p>
          </table:table-cell>
          <table:table-cell table:style-name="ce57" table:formula="of:=[.F11]" office:value-type="float" office:value="0" calcext:value-type="float">
            <text:p>0</text:p>
          </table:table-cell>
          <table:table-cell table:style-name="ce57" table:formula="of:=[.G11]" office:value-type="float" office:value="0" calcext:value-type="float">
            <text:p>0</text:p>
          </table:table-cell>
          <table:table-cell table:style-name="ce28" table:formula="of:=[.H11]" office:value-type="float" office:value="0" calcext:value-type="float">
            <text:p>0</text:p>
          </table:table-cell>
          <table:table-cell table:style-name="ce57" table:formula="of:=[.I11]" office:value-type="float" office:value="0" calcext:value-type="float">
            <text:p>0</text:p>
          </table:table-cell>
          <table:table-cell table:style-name="ce57" table:formula="of:=[.J11]" office:value-type="float" office:value="0" calcext:value-type="float">
            <text:p>0</text:p>
          </table:table-cell>
          <table:table-cell table:style-name="ce63" table:formula="of:=[.K11]" office:value-type="float" office:value="0" calcext:value-type="float">
            <text:p>0,00</text:p>
          </table:table-cell>
          <table:table-cell table:style-name="ce57" table:formula="of:=[.L11]" office:value-type="string" office:string-value="" calcext:value-type="error">
            <text:p>#DIV/0!</text:p>
          </table:table-cell>
          <table:table-cell table:style-name="ce57" table:formula="of:=[.M11]" office:value-type="float" office:value="0" calcext:value-type="float">
            <text:p>0</text:p>
          </table:table-cell>
          <table:table-cell table:style-name="ce57" table:formula="of:=[.N11]" office:value-type="float" office:value="0" calcext:value-type="float">
            <text:p>0</text:p>
          </table:table-cell>
          <table:table-cell table:style-name="ce69" table:formula="of:=[.M54]=[.N54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&quot;&gt;=0&quot;)" office:value-type="float" office:value="0" calcext:value-type="float">
            <text:p>0</text:p>
          </table:table-cell>
          <table:table-cell table:style-name="ce52"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[.V$6])" office:value-type="float" office:value="0" calcext:value-type="float">
            <text:p>0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[.W$6])" office:value-type="float" office:value="0" calcext:value-type="float">
            <text:p>0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&quot;NS&quot;)+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&quot;NS1&quot;)+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&quot;NS2&quot;)" office:value-type="float" office:value="0" calcext:value-type="float">
            <text:p>0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[.Y$6])" office:value-type="float" office:value="0" calcext:value-type="float">
            <text:p>0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;[$'O(DC)-Q(DC)'.$M$1:$'O(DC)-Q(DC)'.$M$1048576];[.Z$6])" office:value-type="float" office:value="0" calcext:value-type="float">
            <text:p>0</text:p>
          </table:table-cell>
          <table:table-cell table:formula="of:=SUMIFS([$'O(DC)-Q(DC)'.$M$1:$'O(DC)-Q(DC)'.$M$1048576];[$'O(DC)-Q(DC)'.$B$1:$'O(DC)-Q(DC)'.$B$1048576];[.$Q54];[$'O(DC)-Q(DC)'.$C$1:$'O(DC)-Q(DC)'.$C$1048576];[.$R54];[$'O(DC)-Q(DC)'.$D$1:$'O(DC)-Q(DC)'.$D$1048576];[.$S54];[$'O(DC)-Q(DC)'.$E$1:$'O(DC)-Q(DC)'.$E$1048576];[.$T54])" office:value-type="float" office:value="0" calcext:value-type="float">
            <text:p>0</text:p>
          </table:table-cell>
          <table:table-cell table:formula="of:=[.AA54]/[.U54]" office:value-type="string" office:string-value="" calcext:value-type="error">
            <text:p>#DIV/0!</text:p>
          </table:table-cell>
          <table:table-cell table:formula="of:=SUM([.U54:.Z54])" office:value-type="float" office:value="0" calcext:value-type="float">
            <text:p>0</text:p>
          </table:table-cell>
          <table:table-cell table:formula="of:=COUNTIFS([$'O(DC)-Q(DC)'.$B$1:$'O(DC)-Q(DC)'.$B$1048576];[.$Q54];[$'O(DC)-Q(DC)'.$C$1:$'O(DC)-Q(DC)'.$C$1048576];[.$R54];[$'O(DC)-Q(DC)'.$D$1:$'O(DC)-Q(DC)'.$D$1048576];[.$S54];[$'O(DC)-Q(DC)'.$E$1:$'O(DC)-Q(DC)'.$E$1048576];[.$T54])" office:value-type="float" office:value="0" calcext:value-type="float">
            <text:p>0</text:p>
          </table:table-cell>
          <table:table-cell table:style-name="ce69" table:formula="of:=[.AC54]=[.AD54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6" office:value-type="string" calcext:value-type="string">
            <text:p>QCEC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lifting</text:p>
          </table:table-cell>
          <table:table-cell table:style-name="ce51" office:value-type="string" calcext:value-type="string">
            <text:p>GP,OE</text:p>
          </table:table-cell>
          <table:table-cell table:style-name="ce57" table:formula="of:=[.E25]" office:value-type="float" office:value="0" calcext:value-type="float">
            <text:p>0</text:p>
          </table:table-cell>
          <table:table-cell table:style-name="ce57" table:formula="of:=[.F25]" office:value-type="float" office:value="0" calcext:value-type="float">
            <text:p>0</text:p>
          </table:table-cell>
          <table:table-cell table:style-name="ce57" table:formula="of:=[.G25]" office:value-type="float" office:value="0" calcext:value-type="float">
            <text:p>0</text:p>
          </table:table-cell>
          <table:table-cell table:style-name="ce28" table:formula="of:=[.H25]" office:value-type="float" office:value="0" calcext:value-type="float">
            <text:p>0</text:p>
          </table:table-cell>
          <table:table-cell table:style-name="ce57" table:formula="of:=[.I25]" office:value-type="float" office:value="0" calcext:value-type="float">
            <text:p>0</text:p>
          </table:table-cell>
          <table:table-cell table:style-name="ce57" table:formula="of:=[.J25]" office:value-type="float" office:value="0" calcext:value-type="float">
            <text:p>0</text:p>
          </table:table-cell>
          <table:table-cell table:style-name="ce63" table:formula="of:=[.K25]" office:value-type="float" office:value="0" calcext:value-type="float">
            <text:p>0,00</text:p>
          </table:table-cell>
          <table:table-cell table:style-name="ce57" table:formula="of:=[.L12]" office:value-type="string" office:string-value="" calcext:value-type="error">
            <text:p>#DIV/0!</text:p>
          </table:table-cell>
          <table:table-cell table:style-name="ce57" table:formula="of:=[.M25]" office:value-type="float" office:value="0" calcext:value-type="float">
            <text:p>0</text:p>
          </table:table-cell>
          <table:table-cell table:style-name="ce57" table:formula="of:=[.N25]" office:value-type="float" office:value="0" calcext:value-type="float">
            <text:p>0</text:p>
          </table:table-cell>
          <table:table-cell table:style-name="ce69" table:formula="of:=[.M55]=[.N55]" office:value-type="boolean" office:boolean-value="true" calcext:value-type="boolean">
            <text:p>VRAI</text:p>
          </table:table-cell>
          <table:table-cell table:number-columns-repeated="21"/>
        </table:table-row>
        <table:table-row table:style-name="ro1">
          <table:table-cell table:style-name="ce46" office:value-type="string" calcext:value-type="string">
            <text:p>QCEC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lifting</text:p>
          </table:table-cell>
          <table:table-cell table:style-name="ce51" office:value-type="string" calcext:value-type="string">
            <text:p>OE</text:p>
          </table:table-cell>
          <table:table-cell table:style-name="ce57" table:formula="of:=[.E26]" office:value-type="float" office:value="0" calcext:value-type="float">
            <text:p>0</text:p>
          </table:table-cell>
          <table:table-cell table:style-name="ce57" table:formula="of:=[.F26]" office:value-type="float" office:value="0" calcext:value-type="float">
            <text:p>0</text:p>
          </table:table-cell>
          <table:table-cell table:style-name="ce57" table:formula="of:=[.G26]" office:value-type="float" office:value="0" calcext:value-type="float">
            <text:p>0</text:p>
          </table:table-cell>
          <table:table-cell table:style-name="ce28" table:formula="of:=[.H26]" office:value-type="float" office:value="0" calcext:value-type="float">
            <text:p>0</text:p>
          </table:table-cell>
          <table:table-cell table:style-name="ce57" table:formula="of:=[.I26]" office:value-type="float" office:value="0" calcext:value-type="float">
            <text:p>0</text:p>
          </table:table-cell>
          <table:table-cell table:style-name="ce57" table:formula="of:=[.J26]" office:value-type="float" office:value="0" calcext:value-type="float">
            <text:p>0</text:p>
          </table:table-cell>
          <table:table-cell table:style-name="ce63" table:formula="of:=[.K26]" office:value-type="float" office:value="0" calcext:value-type="float">
            <text:p>0,00</text:p>
          </table:table-cell>
          <table:table-cell table:style-name="ce57" table:formula="of:=[.L26]" office:value-type="string" office:string-value="" calcext:value-type="error">
            <text:p>#DIV/0!</text:p>
          </table:table-cell>
          <table:table-cell table:style-name="ce57" table:formula="of:=[.M26]" office:value-type="float" office:value="0" calcext:value-type="float">
            <text:p>0</text:p>
          </table:table-cell>
          <table:table-cell table:style-name="ce57" table:formula="of:=[.N26]" office:value-type="float" office:value="0" calcext:value-type="float">
            <text:p>0</text:p>
          </table:table-cell>
          <table:table-cell table:style-name="ce69" table:formula="of:=[.M56]=[.N56]" office:value-type="boolean" office:boolean-value="true" calcext:value-type="boolean">
            <text:p>VRAI</text:p>
          </table:table-cell>
          <table:table-cell/>
          <table:table-cell table:style-name="ce3" office:value-type="string" calcext:value-type="string" table:number-columns-spanned="15" table:number-rows-spanned="3">
            <text:p>O(U)-T(U)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4"/>
          <table:table-cell table:number-columns-repeated="5"/>
        </table:table-row>
        <table:table-row table:style-name="ro1">
          <table:table-cell table:style-name="ce46" office:value-type="string" calcext:value-type="string">
            <text:p>QCEC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standalone</text:p>
          </table:table-cell>
          <table:table-cell table:style-name="ce51" office:value-type="string" calcext:value-type="string">
            <text:p>DM,OE</text:p>
          </table:table-cell>
          <table:table-cell table:style-name="ce57" table:formula="of:=[.E27]" office:value-type="float" office:value="0" calcext:value-type="float">
            <text:p>0</text:p>
          </table:table-cell>
          <table:table-cell table:style-name="ce57" table:formula="of:=[.F27]" office:value-type="float" office:value="0" calcext:value-type="float">
            <text:p>0</text:p>
          </table:table-cell>
          <table:table-cell table:style-name="ce57" table:formula="of:=[.G27]" office:value-type="float" office:value="0" calcext:value-type="float">
            <text:p>0</text:p>
          </table:table-cell>
          <table:table-cell table:style-name="ce28" table:formula="of:=[.H27]" office:value-type="float" office:value="0" calcext:value-type="float">
            <text:p>0</text:p>
          </table:table-cell>
          <table:table-cell table:style-name="ce57" table:formula="of:=[.I27]" office:value-type="float" office:value="0" calcext:value-type="float">
            <text:p>0</text:p>
          </table:table-cell>
          <table:table-cell table:style-name="ce57" table:formula="of:=[.J27]" office:value-type="float" office:value="0" calcext:value-type="float">
            <text:p>0</text:p>
          </table:table-cell>
          <table:table-cell table:style-name="ce63" table:formula="of:=[.K27]" office:value-type="float" office:value="0" calcext:value-type="float">
            <text:p>0,00</text:p>
          </table:table-cell>
          <table:table-cell table:style-name="ce57" table:formula="of:=[.L27]" office:value-type="string" office:string-value="" calcext:value-type="error">
            <text:p>#DIV/0!</text:p>
          </table:table-cell>
          <table:table-cell table:style-name="ce57" table:formula="of:=[.M27]" office:value-type="float" office:value="0" calcext:value-type="float">
            <text:p>0</text:p>
          </table:table-cell>
          <table:table-cell table:style-name="ce57" table:formula="of:=[.N27]" office:value-type="float" office:value="0" calcext:value-type="float">
            <text:p>0</text:p>
          </table:table-cell>
          <table:table-cell table:style-name="ce69" table:formula="of:=[.M57]=[.N57]" office:value-type="boolean" office:boolean-value="true" calcext:value-type="boolean">
            <text:p>VRAI</text:p>
          </table:table-cell>
          <table:table-cell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6" office:value-type="string" calcext:value-type="string">
            <text:p>QCEC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standalone</text:p>
          </table:table-cell>
          <table:table-cell table:style-name="ce51" office:value-type="string" calcext:value-type="string">
            <text:p>GP,DM,OE</text:p>
          </table:table-cell>
          <table:table-cell table:style-name="ce57" table:formula="of:=[.E28]" office:value-type="float" office:value="0" calcext:value-type="float">
            <text:p>0</text:p>
          </table:table-cell>
          <table:table-cell table:style-name="ce57" table:formula="of:=[.F28]" office:value-type="float" office:value="0" calcext:value-type="float">
            <text:p>0</text:p>
          </table:table-cell>
          <table:table-cell table:style-name="ce57" table:formula="of:=[.G28]" office:value-type="float" office:value="0" calcext:value-type="float">
            <text:p>0</text:p>
          </table:table-cell>
          <table:table-cell table:style-name="ce28" table:formula="of:=[.H28]" office:value-type="float" office:value="0" calcext:value-type="float">
            <text:p>0</text:p>
          </table:table-cell>
          <table:table-cell table:style-name="ce57" table:formula="of:=[.I28]" office:value-type="float" office:value="0" calcext:value-type="float">
            <text:p>0</text:p>
          </table:table-cell>
          <table:table-cell table:style-name="ce57" table:formula="of:=[.J28]" office:value-type="float" office:value="0" calcext:value-type="float">
            <text:p>0</text:p>
          </table:table-cell>
          <table:table-cell table:style-name="ce63" table:formula="of:=[.K28]" office:value-type="float" office:value="0" calcext:value-type="float">
            <text:p>0,00</text:p>
          </table:table-cell>
          <table:table-cell table:style-name="ce57" table:formula="of:=[.L28]" office:value-type="string" office:string-value="" calcext:value-type="error">
            <text:p>#DIV/0!</text:p>
          </table:table-cell>
          <table:table-cell table:style-name="ce57" table:formula="of:=[.M28]" office:value-type="float" office:value="0" calcext:value-type="float">
            <text:p>0</text:p>
          </table:table-cell>
          <table:table-cell table:style-name="ce57" table:formula="of:=[.N28]" office:value-type="float" office:value="0" calcext:value-type="float">
            <text:p>0</text:p>
          </table:table-cell>
          <table:table-cell table:style-name="ce69" table:formula="of:=[.M58]=[.N58]" office:value-type="boolean" office:boolean-value="true" calcext:value-type="boolean">
            <text:p>VRAI</text:p>
          </table:table-cell>
          <table:table-cell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NoDM,NoPartial</text:p>
          </table:table-cell>
          <table:table-cell table:style-name="ce57" table:formula="of:=[.E12]" office:value-type="float" office:value="0" calcext:value-type="float">
            <text:p>0</text:p>
          </table:table-cell>
          <table:table-cell table:style-name="ce57" table:formula="of:=[.F12]" office:value-type="float" office:value="0" calcext:value-type="float">
            <text:p>0</text:p>
          </table:table-cell>
          <table:table-cell table:style-name="ce57" table:formula="of:=[.G12]" office:value-type="float" office:value="0" calcext:value-type="float">
            <text:p>0</text:p>
          </table:table-cell>
          <table:table-cell table:style-name="ce28" table:formula="of:=[.H12]" office:value-type="float" office:value="0" calcext:value-type="float">
            <text:p>0</text:p>
          </table:table-cell>
          <table:table-cell table:style-name="ce57" table:formula="of:=[.I12]" office:value-type="float" office:value="0" calcext:value-type="float">
            <text:p>0</text:p>
          </table:table-cell>
          <table:table-cell table:style-name="ce57" table:formula="of:=[.J12]" office:value-type="float" office:value="0" calcext:value-type="float">
            <text:p>0</text:p>
          </table:table-cell>
          <table:table-cell table:style-name="ce63" table:formula="of:=[.K12]" office:value-type="float" office:value="0" calcext:value-type="float">
            <text:p>0,00</text:p>
          </table:table-cell>
          <table:table-cell table:style-name="ce57" table:formula="of:=[.L12]" office:value-type="string" office:string-value="" calcext:value-type="error">
            <text:p>#DIV/0!</text:p>
          </table:table-cell>
          <table:table-cell table:style-name="ce57" table:formula="of:=[.M12]" office:value-type="float" office:value="0" calcext:value-type="float">
            <text:p>0</text:p>
          </table:table-cell>
          <table:table-cell table:style-name="ce57" table:formula="of:=[.N12]" office:value-type="float" office:value="0" calcext:value-type="float">
            <text:p>0</text:p>
          </table:table-cell>
          <table:table-cell table:style-name="ce69" table:formula="of:=[.M59]=[.N59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Tool</text:p>
          </table:table-cell>
          <table:table-cell table:style-name="ce76" office:value-type="string" calcext:value-type="string">
            <text:p>Version</text:p>
          </table:table-cell>
          <table:table-cell table:style-name="ce44" office:value-type="string" calcext:value-type="string">
            <text:p>Lift</text:p>
          </table:table-cell>
          <table:table-cell table:style-name="ce44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78" office:value-type="string" calcext:value-type="string">
            <text:p>TT</text:p>
          </table:table-cell>
          <table:table-cell table:style-name="ce82" office:value-type="string" calcext:value-type="string">
            <text:p>AT</text:p>
          </table:table-cell>
          <table:table-cell table:style-name="ce85" office:value-type="string" calcext:value-type="string">
            <text:p>Greet</text:p>
          </table:table-cell>
          <table:table-cell table:style-name="ce8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Sequence</text:p>
          </table:table-cell>
          <table:table-cell table:style-name="ce57" table:formula="of:=[.E29]+[.E37]" office:value-type="float" office:value="0" calcext:value-type="float">
            <text:p>0</text:p>
          </table:table-cell>
          <table:table-cell table:style-name="ce57" table:formula="of:=[.F29]+[.F37]" office:value-type="float" office:value="0" calcext:value-type="float">
            <text:p>0</text:p>
          </table:table-cell>
          <table:table-cell table:style-name="ce57" table:formula="of:=[.G29]+[.G37]" office:value-type="float" office:value="0" calcext:value-type="float">
            <text:p>0</text:p>
          </table:table-cell>
          <table:table-cell table:style-name="ce28" table:formula="of:=[.H29]+[.H37]" office:value-type="float" office:value="0" calcext:value-type="float">
            <text:p>0</text:p>
          </table:table-cell>
          <table:table-cell table:style-name="ce57" table:formula="of:=[.I29]+[.I37]" office:value-type="float" office:value="0" calcext:value-type="float">
            <text:p>0</text:p>
          </table:table-cell>
          <table:table-cell table:style-name="ce57" table:formula="of:=[.J29]+[.J37]" office:value-type="float" office:value="0" calcext:value-type="float">
            <text:p>0</text:p>
          </table:table-cell>
          <table:table-cell table:style-name="ce63" table:formula="of:=[.K29]+[.K37]" office:value-type="float" office:value="0" calcext:value-type="float">
            <text:p>0,00</text:p>
          </table:table-cell>
          <table:table-cell table:style-name="ce57" table:formula="of:=[.L29]+[.L37]" office:value-type="string" office:string-value="" calcext:value-type="error">
            <text:p>#DIV/0!</text:p>
          </table:table-cell>
          <table:table-cell table:style-name="ce57" table:formula="of:=[.M29]+[.M37]" office:value-type="float" office:value="0" calcext:value-type="float">
            <text:p>0</text:p>
          </table:table-cell>
          <table:table-cell table:style-name="ce57" table:formula="of:=[.N29]+[.N37]" office:value-type="float" office:value="0" calcext:value-type="float">
            <text:p>0</text:p>
          </table:table-cell>
          <table:table-cell table:style-name="ce69" table:formula="of:=[.M60]=[.N60]" office:value-type="boolean" office:boolean-value="true" calcext:value-type="boolean">
            <text:p>VRAI</text:p>
          </table:table-cell>
          <table:table-cell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&quot;&gt;=0&quot;)" office:value-type="float" office:value="0" calcext:value-type="float">
            <text:p>0</text:p>
          </table:table-cell>
          <table:table-cell table:style-name="ce52"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[.V$6])" office:value-type="float" office:value="0" calcext:value-type="float">
            <text:p>0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[.W$6])" office:value-type="float" office:value="0" calcext:value-type="float">
            <text:p>0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&quot;NS&quot;)+COUNTIFS([$'O(U)-T(U)'.$B$1:$'O(U)-T(U)'.$B$1048576];[.$Q60];[$'O(U)-T(U)'.$C$1:$'O(U)-T(U)'.$C$1048576];[.$R60];[$'O(U)-T(U)'.$D$1:$'O(U)-T(U)'.$D$1048576];[.$S60];[$'O(U)-T(U)'.$E$1:$'O(U)-T(U)'.$E$1048576];[.$T60];[$'O(U)-T(U)'.$M$1:$'O(U)-T(U)'.$M$1048576];&quot;NS1&quot;)+COUNTIFS([$'O(U)-T(U)'.$B$1:$'O(U)-T(U)'.$B$1048576];[.$Q60];[$'O(U)-T(U)'.$C$1:$'O(U)-T(U)'.$C$1048576];[.$R60];[$'O(U)-T(U)'.$D$1:$'O(U)-T(U)'.$D$1048576];[.$S60];[$'O(U)-T(U)'.$E$1:$'O(U)-T(U)'.$E$1048576];[.$T60];[$'O(U)-T(U)'.$M$1:$'O(U)-T(U)'.$M$1048576];&quot;NS2&quot;)" office:value-type="float" office:value="0" calcext:value-type="float">
            <text:p>0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[.Y$6])" office:value-type="float" office:value="0" calcext:value-type="float">
            <text:p>0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;[$'O(U)-T(U)'.$M$1:$'O(U)-T(U)'.$M$1048576];[.Z$6])" office:value-type="float" office:value="0" calcext:value-type="float">
            <text:p>0</text:p>
          </table:table-cell>
          <table:table-cell table:formula="of:=SUMIFS([$'O(U)-T(U)'.$M$1:$'O(U)-T(U)'.$M$1048576];[$'O(U)-T(U)'.$B$1:$'O(U)-T(U)'.$B$1048576];[.$Q60];[$'O(U)-T(U)'.$C$1:$'O(U)-T(U)'.$C$1048576];[.$R60];[$'O(U)-T(U)'.$D$1:$'O(U)-T(U)'.$D$1048576];[.$S60];[$'O(U)-T(U)'.$E$1:$'O(U)-T(U)'.$E$1048576];[.$T60])" office:value-type="float" office:value="0" calcext:value-type="float">
            <text:p>0</text:p>
          </table:table-cell>
          <table:table-cell table:formula="of:=[.AA60]/[.U60]" office:value-type="string" office:string-value="" calcext:value-type="error">
            <text:p>#DIV/0!</text:p>
          </table:table-cell>
          <table:table-cell table:formula="of:=SUM([.U60:.Z60])" office:value-type="float" office:value="0" calcext:value-type="float">
            <text:p>0</text:p>
          </table:table-cell>
          <table:table-cell table:formula="of:=COUNTIFS([$'O(U)-T(U)'.$B$1:$'O(U)-T(U)'.$B$1048576];[.$Q60];[$'O(U)-T(U)'.$C$1:$'O(U)-T(U)'.$C$1048576];[.$R60];[$'O(U)-T(U)'.$D$1:$'O(U)-T(U)'.$D$1048576];[.$S60];[$'O(U)-T(U)'.$E$1:$'O(U)-T(U)'.$E$1048576];[.$T60])" office:value-type="float" office:value="0" calcext:value-type="float">
            <text:p>0</text:p>
          </table:table-cell>
          <table:table-cell table:style-name="ce69" table:formula="of:=[.AC60]=[.AD60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Parallel</text:p>
          </table:table-cell>
          <table:table-cell table:style-name="ce57" table:formula="of:=[.E30]+[.E38]" office:value-type="float" office:value="0" calcext:value-type="float">
            <text:p>0</text:p>
          </table:table-cell>
          <table:table-cell table:style-name="ce57" table:formula="of:=[.F30]+[.F38]" office:value-type="float" office:value="0" calcext:value-type="float">
            <text:p>0</text:p>
          </table:table-cell>
          <table:table-cell table:style-name="ce57" table:formula="of:=[.G30]+[.G38]" office:value-type="float" office:value="0" calcext:value-type="float">
            <text:p>0</text:p>
          </table:table-cell>
          <table:table-cell table:style-name="ce28" table:formula="of:=[.H30]+[.H38]" office:value-type="float" office:value="0" calcext:value-type="float">
            <text:p>0</text:p>
          </table:table-cell>
          <table:table-cell table:style-name="ce57" table:formula="of:=[.I30]+[.I38]" office:value-type="float" office:value="0" calcext:value-type="float">
            <text:p>0</text:p>
          </table:table-cell>
          <table:table-cell table:style-name="ce57" table:formula="of:=[.J30]+[.J38]" office:value-type="float" office:value="0" calcext:value-type="float">
            <text:p>0</text:p>
          </table:table-cell>
          <table:table-cell table:style-name="ce63" table:formula="of:=[.K30]+[.K38]" office:value-type="float" office:value="0" calcext:value-type="float">
            <text:p>0,00</text:p>
          </table:table-cell>
          <table:table-cell table:style-name="ce57" table:formula="of:=[.L30]+[.L38]" office:value-type="string" office:string-value="" calcext:value-type="error">
            <text:p>#DIV/0!</text:p>
          </table:table-cell>
          <table:table-cell table:style-name="ce57" table:formula="of:=[.M30]+[.M38]" office:value-type="float" office:value="0" calcext:value-type="float">
            <text:p>0</text:p>
          </table:table-cell>
          <table:table-cell table:style-name="ce57" table:formula="of:=[.N30]+[.N38]" office:value-type="float" office:value="0" calcext:value-type="float">
            <text:p>0</text:p>
          </table:table-cell>
          <table:table-cell table:style-name="ce69" table:formula="of:=[.M61]=[.N61]" office:value-type="boolean" office:boolean-value="true" calcext:value-type="boolean">
            <text:p>VRAI</text:p>
          </table:table-cell>
          <table:table-cell table:number-columns-repeated="21"/>
        </table:table-row>
        <table:table-row table:style-name="ro1">
          <table:table-cell table:style-name="ce43" office:value-type="string" calcext:value-type="string">
            <text:p>SQbrick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standalone</text:p>
          </table:table-cell>
          <table:table-cell table:style-name="ce53" office:value-type="string" calcext:value-type="string">
            <text:p>Sequence</text:p>
          </table:table-cell>
          <table:table-cell table:style-name="ce57" table:formula="of:=[.E13]" office:value-type="float" office:value="0" calcext:value-type="float">
            <text:p>0</text:p>
          </table:table-cell>
          <table:table-cell table:style-name="ce57" table:formula="of:=[.F13]" office:value-type="float" office:value="0" calcext:value-type="float">
            <text:p>0</text:p>
          </table:table-cell>
          <table:table-cell table:style-name="ce57" table:formula="of:=[.G13]" office:value-type="float" office:value="0" calcext:value-type="float">
            <text:p>0</text:p>
          </table:table-cell>
          <table:table-cell table:style-name="ce28" table:formula="of:=[.H13]" office:value-type="float" office:value="0" calcext:value-type="float">
            <text:p>0</text:p>
          </table:table-cell>
          <table:table-cell table:style-name="ce57" table:formula="of:=[.I13]" office:value-type="float" office:value="0" calcext:value-type="float">
            <text:p>0</text:p>
          </table:table-cell>
          <table:table-cell table:style-name="ce57" table:formula="of:=[.J13]" office:value-type="float" office:value="0" calcext:value-type="float">
            <text:p>0</text:p>
          </table:table-cell>
          <table:table-cell table:style-name="ce63" table:formula="of:=[.K13]" office:value-type="float" office:value="0" calcext:value-type="float">
            <text:p>0,00</text:p>
          </table:table-cell>
          <table:table-cell table:style-name="ce57" table:formula="of:=[.L13]" office:value-type="string" office:string-value="" calcext:value-type="error">
            <text:p>#DIV/0!</text:p>
          </table:table-cell>
          <table:table-cell table:style-name="ce57" table:formula="of:=[.M13]" office:value-type="float" office:value="0" calcext:value-type="float">
            <text:p>0</text:p>
          </table:table-cell>
          <table:table-cell table:style-name="ce57" table:formula="of:=[.N13]" office:value-type="float" office:value="0" calcext:value-type="float">
            <text:p>0</text:p>
          </table:table-cell>
          <table:table-cell table:style-name="ce69" table:formula="of:=[.M62]=[.N62]" office:value-type="boolean" office:boolean-value="true" calcext:value-type="boolean">
            <text:p>VRAI</text:p>
          </table:table-cell>
          <table:table-cell table:number-columns-repeated="21"/>
        </table:table-row>
        <table:table-row table:style-name="ro1"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office:value-type="string" calcext:value-type="string">
            <text:p>standalone</text:p>
          </table:table-cell>
          <table:table-cell table:style-name="ce54" office:value-type="string" calcext:value-type="string">
            <text:p>Parallel</text:p>
          </table:table-cell>
          <table:table-cell table:style-name="ce57" table:formula="of:=[.E14]" office:value-type="float" office:value="0" calcext:value-type="float">
            <text:p>0</text:p>
          </table:table-cell>
          <table:table-cell table:style-name="ce57" table:formula="of:=[.F14]" office:value-type="float" office:value="0" calcext:value-type="float">
            <text:p>0</text:p>
          </table:table-cell>
          <table:table-cell table:style-name="ce57" table:formula="of:=[.G14]" office:value-type="float" office:value="0" calcext:value-type="float">
            <text:p>0</text:p>
          </table:table-cell>
          <table:table-cell table:style-name="ce28" table:formula="of:=[.H14]" office:value-type="float" office:value="0" calcext:value-type="float">
            <text:p>0</text:p>
          </table:table-cell>
          <table:table-cell table:style-name="ce57" table:formula="of:=[.I14]" office:value-type="float" office:value="0" calcext:value-type="float">
            <text:p>0</text:p>
          </table:table-cell>
          <table:table-cell table:style-name="ce57" table:formula="of:=[.J14]" office:value-type="float" office:value="0" calcext:value-type="float">
            <text:p>0</text:p>
          </table:table-cell>
          <table:table-cell table:style-name="ce63" table:formula="of:=[.K14]" office:value-type="float" office:value="0" calcext:value-type="float">
            <text:p>0,00</text:p>
          </table:table-cell>
          <table:table-cell table:style-name="ce57" table:formula="of:=[.L14]" office:value-type="string" office:string-value="" calcext:value-type="error">
            <text:p>#DIV/0!</text:p>
          </table:table-cell>
          <table:table-cell table:style-name="ce57" table:formula="of:=[.M14]" office:value-type="float" office:value="0" calcext:value-type="float">
            <text:p>0</text:p>
          </table:table-cell>
          <table:table-cell table:style-name="ce57" table:formula="of:=[.N14]" office:value-type="float" office:value="0" calcext:value-type="float">
            <text:p>0</text:p>
          </table:table-cell>
          <table:table-cell table:style-name="ce69" table:formula="of:=[.M63]=[.N63]" office:value-type="boolean" office:boolean-value="true" calcext:value-type="boolean">
            <text:p>VRAI</text:p>
          </table:table-cell>
          <table:table-cell/>
          <table:table-cell table:style-name="ce3" office:value-type="string" calcext:value-type="string" table:number-columns-spanned="15" table:number-rows-spanned="3">
            <text:p>Totals</text:p>
          </table:table-cell>
          <table:covered-table-cell table:style-name="ce11"/>
          <table:covered-table-cell table:style-name="ce19"/>
          <table:covered-table-cell table:style-name="ce4"/>
          <table:covered-table-cell table:number-columns-repeated="6"/>
          <table:covered-table-cell table:style-name="ce59"/>
          <table:covered-table-cell table:number-columns-repeated="3"/>
          <table:covered-table-cell table:style-name="ce80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covered-table-cell table:style-name="ce4"/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covered-table-cell table:style-name="ce4" office:value-type="string" calcext:value-type="string">
            <text:p>Feynman</text:p>
          </table:covered-table-cell>
          <table:covered-table-cell table:style-name="ce11"/>
          <table:covered-table-cell table:style-name="ce19"/>
          <table:covered-table-cell table:style-name="ce4"/>
          <table:covered-table-cell table:number-columns-repeated="6" table:style-name="ce16"/>
          <table:covered-table-cell table:style-name="ce41"/>
          <table:covered-table-cell table:style-name="ce62"/>
          <table:covered-table-cell table:style-name="ce3"/>
          <table:covered-table-cell table:style-name="ce16"/>
          <table:covered-table-cell table:style-name="ce75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3" office:value-type="string" calcext:value-type="string">
            <text:p>Tool</text:p>
          </table:table-cell>
          <table:table-cell table:style-name="ce48" office:value-type="string" calcext:value-type="string">
            <text:p>Version</text:p>
          </table:table-cell>
          <table:table-cell table:style-name="ce43" office:value-type="string" calcext:value-type="string">
            <text:p>Lift</text:p>
          </table:table-cell>
          <table:table-cell table:style-name="ce43" office:value-type="string" calcext:value-type="string">
            <text:p>Opt</text:p>
          </table:table-cell>
          <table:table-cell table:style-name="ce56" office:value-type="string" calcext:value-type="string">
            <text:p>Succ</text:p>
          </table:table-cell>
          <table:table-cell table:style-name="ce56" office:value-type="string" calcext:value-type="string">
            <text:p>NE</text:p>
          </table:table-cell>
          <table:table-cell table:style-name="ce56" office:value-type="string" calcext:value-type="string">
            <text:p>NC</text:p>
          </table:table-cell>
          <table:table-cell table:style-name="ce56" office:value-type="string" calcext:value-type="string">
            <text:p>NS</text:p>
          </table:table-cell>
          <table:table-cell table:style-name="ce58" office:value-type="string" calcext:value-type="string">
            <text:p>TO</text:p>
          </table:table-cell>
          <table:table-cell table:style-name="ce56" office:value-type="string" calcext:value-type="string">
            <text:p>Fail</text:p>
          </table:table-cell>
          <table:table-cell table:style-name="ce61" office:value-type="string" calcext:value-type="string">
            <text:p>TT</text:p>
          </table:table-cell>
          <table:table-cell table:style-name="ce64" office:value-type="string" calcext:value-type="string">
            <text:p>AT</text:p>
          </table:table-cell>
          <table:table-cell table:style-name="ce65" office:value-type="string" calcext:value-type="string">
            <text:p>Greet</text:p>
          </table:table-cell>
          <table:table-cell table:style-name="ce65" office:value-type="string" calcext:value-type="string">
            <text:p>Expect</text:p>
          </table:table-cell>
          <table:table-cell table:style-name="ce67"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2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U23]+[.U38]" office:value-type="float" office:value="0" calcext:value-type="float">
            <text:p>0</text:p>
          </table:table-cell>
          <table:table-cell table:style-name="ce68" table:formula="of:=[.V23]+[.V38]" office:value-type="float" office:value="0" calcext:value-type="float">
            <text:p>0</text:p>
          </table:table-cell>
          <table:table-cell table:style-name="ce55" table:formula="of:=[.W23]+[.W38]" office:value-type="float" office:value="0" calcext:value-type="float">
            <text:p>0</text:p>
          </table:table-cell>
          <table:table-cell table:style-name="ce55" table:formula="of:=[.X23]+[.X38]" office:value-type="float" office:value="0" calcext:value-type="float">
            <text:p>0</text:p>
          </table:table-cell>
          <table:table-cell table:style-name="ce55" table:formula="of:=[.Y23]+[.Y38]" office:value-type="float" office:value="0" calcext:value-type="float">
            <text:p>0</text:p>
          </table:table-cell>
          <table:table-cell table:style-name="ce55" table:formula="of:=[.Z23]+[.Z38]" office:value-type="float" office:value="0" calcext:value-type="float">
            <text:p>0</text:p>
          </table:table-cell>
          <table:table-cell table:style-name="ce55" table:formula="of:=[.AA23]+[.AA38]" office:value-type="float" office:value="0" calcext:value-type="float">
            <text:p>0</text:p>
          </table:table-cell>
          <table:table-cell table:style-name="ce62" table:formula="of:=[.AA67]/[.U67]" office:value-type="string" office:string-value="" calcext:value-type="error">
            <text:p>#DIV/0!</text:p>
          </table:table-cell>
          <table:table-cell table:style-name="ce55" table:formula="of:=[.AC23]+[.AC38]" office:value-type="float" office:value="0" calcext:value-type="float">
            <text:p>0</text:p>
          </table:table-cell>
          <table:table-cell table:style-name="ce55" table:formula="of:=[.AD23]+[.AD38]" office:value-type="float" office:value="0" calcext:value-type="float">
            <text:p>0</text:p>
          </table:table-cell>
          <table:table-cell table:style-name="ce69" table:formula="of:=[.AC67]=[.AD67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AutoQ</text:p>
          </table:table-cell>
          <table:table-cell table:style-name="ce50" office:value-type="string" calcext:value-type="string">
            <text:p>POPL25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U24]+[.U39]" office:value-type="float" office:value="0" calcext:value-type="float">
            <text:p>0</text:p>
          </table:table-cell>
          <table:table-cell table:style-name="ce68" table:formula="of:=[.V24]+[.V39]" office:value-type="float" office:value="0" calcext:value-type="float">
            <text:p>0</text:p>
          </table:table-cell>
          <table:table-cell table:style-name="ce55" table:formula="of:=[.W24]+[.W39]" office:value-type="float" office:value="0" calcext:value-type="float">
            <text:p>0</text:p>
          </table:table-cell>
          <table:table-cell table:style-name="ce55" table:formula="of:=[.X24]+[.X39]" office:value-type="float" office:value="0" calcext:value-type="float">
            <text:p>0</text:p>
          </table:table-cell>
          <table:table-cell table:style-name="ce55" table:formula="of:=[.Y24]+[.Y39]" office:value-type="float" office:value="0" calcext:value-type="float">
            <text:p>0</text:p>
          </table:table-cell>
          <table:table-cell table:style-name="ce55" table:formula="of:=[.Z24]+[.Z39]" office:value-type="float" office:value="0" calcext:value-type="float">
            <text:p>0</text:p>
          </table:table-cell>
          <table:table-cell table:style-name="ce55" table:formula="of:=[.AA24]+[.AA39]" office:value-type="float" office:value="0" calcext:value-type="float">
            <text:p>0</text:p>
          </table:table-cell>
          <table:table-cell table:style-name="ce62" table:formula="of:=[.AA68]/[.U68]" office:value-type="string" office:string-value="" calcext:value-type="error">
            <text:p>#DIV/0!</text:p>
          </table:table-cell>
          <table:table-cell table:style-name="ce55" table:formula="of:=[.AC24]+[.AC39]" office:value-type="float" office:value="0" calcext:value-type="float">
            <text:p>0</text:p>
          </table:table-cell>
          <table:table-cell table:style-name="ce55" table:formula="of:=[.AD24]+[.AD39]" office:value-type="float" office:value="0" calcext:value-type="float">
            <text:p>0</text:p>
          </table:table-cell>
          <table:table-cell table:style-name="ce69" table:formula="of:=[.AC68]=[.AD68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13-10-2022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U25]+[.U40]" office:value-type="float" office:value="0" calcext:value-type="float">
            <text:p>0</text:p>
          </table:table-cell>
          <table:table-cell table:style-name="ce68" table:formula="of:=[.V25]+[.V40]" office:value-type="float" office:value="0" calcext:value-type="float">
            <text:p>0</text:p>
          </table:table-cell>
          <table:table-cell table:style-name="ce55" table:formula="of:=[.W25]+[.W40]" office:value-type="float" office:value="0" calcext:value-type="float">
            <text:p>0</text:p>
          </table:table-cell>
          <table:table-cell table:style-name="ce55" table:formula="of:=[.X25]+[.X40]" office:value-type="float" office:value="0" calcext:value-type="float">
            <text:p>0</text:p>
          </table:table-cell>
          <table:table-cell table:style-name="ce55" table:formula="of:=[.Y25]+[.Y40]" office:value-type="float" office:value="0" calcext:value-type="float">
            <text:p>0</text:p>
          </table:table-cell>
          <table:table-cell table:style-name="ce55" table:formula="of:=[.Z25]+[.Z40]" office:value-type="float" office:value="0" calcext:value-type="float">
            <text:p>0</text:p>
          </table:table-cell>
          <table:table-cell table:style-name="ce55" table:formula="of:=[.AA25]+[.AA40]" office:value-type="float" office:value="0" calcext:value-type="float">
            <text:p>0</text:p>
          </table:table-cell>
          <table:table-cell table:style-name="ce62" table:formula="of:=[.AA69]/[.U69]" office:value-type="string" office:string-value="" calcext:value-type="error">
            <text:p>#DIV/0!</text:p>
          </table:table-cell>
          <table:table-cell table:style-name="ce55" table:formula="of:=[.AC25]+[.AC40]" office:value-type="float" office:value="0" calcext:value-type="float">
            <text:p>0</text:p>
          </table:table-cell>
          <table:table-cell table:style-name="ce55" table:formula="of:=[.AD25]+[.AD40]" office:value-type="float" office:value="0" calcext:value-type="float">
            <text:p>0</text:p>
          </table:table-cell>
          <table:table-cell table:style-name="ce69" table:formula="of:=[.AC69]=[.AD69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Feynman</text:p>
          </table:table-cell>
          <table:table-cell table:style-name="ce50" office:value-type="string" calcext:value-type="string">
            <text:p>28-11-2024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U26]+[.U41]" office:value-type="float" office:value="0" calcext:value-type="float">
            <text:p>0</text:p>
          </table:table-cell>
          <table:table-cell table:style-name="ce68" table:formula="of:=[.V26]+[.V41]" office:value-type="float" office:value="0" calcext:value-type="float">
            <text:p>0</text:p>
          </table:table-cell>
          <table:table-cell table:style-name="ce55" table:formula="of:=[.W26]+[.W41]" office:value-type="float" office:value="0" calcext:value-type="float">
            <text:p>0</text:p>
          </table:table-cell>
          <table:table-cell table:style-name="ce55" table:formula="of:=[.X26]+[.X41]" office:value-type="float" office:value="0" calcext:value-type="float">
            <text:p>0</text:p>
          </table:table-cell>
          <table:table-cell table:style-name="ce55" table:formula="of:=[.Y26]+[.Y41]" office:value-type="float" office:value="0" calcext:value-type="float">
            <text:p>0</text:p>
          </table:table-cell>
          <table:table-cell table:style-name="ce55" table:formula="of:=[.Z26]+[.Z41]" office:value-type="float" office:value="0" calcext:value-type="float">
            <text:p>0</text:p>
          </table:table-cell>
          <table:table-cell table:style-name="ce55" table:formula="of:=[.AA26]+[.AA41]" office:value-type="float" office:value="0" calcext:value-type="float">
            <text:p>0</text:p>
          </table:table-cell>
          <table:table-cell table:style-name="ce62" table:formula="of:=[.AA70]/[.U70]" office:value-type="string" office:string-value="" calcext:value-type="error">
            <text:p>#DIV/0!</text:p>
          </table:table-cell>
          <table:table-cell table:style-name="ce55" table:formula="of:=[.AC26]+[.AC41]" office:value-type="float" office:value="0" calcext:value-type="float">
            <text:p>0</text:p>
          </table:table-cell>
          <table:table-cell table:style-name="ce55" table:formula="of:=[.AD26]+[.AD41]" office:value-type="float" office:value="0" calcext:value-type="float">
            <text:p>0</text:p>
          </table:table-cell>
          <table:table-cell table:style-name="ce69" table:formula="of:=[.AC70]=[.AD70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PyZX</text:p>
          </table:table-cell>
          <table:table-cell table:style-name="ce50" office:value-type="string" calcext:value-type="string">
            <text:p>0.9.0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None</text:p>
          </table:table-cell>
          <table:table-cell table:style-name="ce55" table:formula="of:=[.U27]+[.U42]" office:value-type="float" office:value="0" calcext:value-type="float">
            <text:p>0</text:p>
          </table:table-cell>
          <table:table-cell table:style-name="ce68" table:formula="of:=[.V27]+[.V42]" office:value-type="float" office:value="0" calcext:value-type="float">
            <text:p>0</text:p>
          </table:table-cell>
          <table:table-cell table:style-name="ce55" table:formula="of:=[.W27]+[.W42]" office:value-type="float" office:value="0" calcext:value-type="float">
            <text:p>0</text:p>
          </table:table-cell>
          <table:table-cell table:style-name="ce55" table:formula="of:=[.X27]+[.X42]" office:value-type="float" office:value="0" calcext:value-type="float">
            <text:p>0</text:p>
          </table:table-cell>
          <table:table-cell table:style-name="ce55" table:formula="of:=[.Y27]+[.Y42]" office:value-type="float" office:value="0" calcext:value-type="float">
            <text:p>0</text:p>
          </table:table-cell>
          <table:table-cell table:style-name="ce55" table:formula="of:=[.Z27]+[.Z42]" office:value-type="float" office:value="0" calcext:value-type="float">
            <text:p>0</text:p>
          </table:table-cell>
          <table:table-cell table:style-name="ce55" table:formula="of:=[.AA27]+[.AA42]" office:value-type="float" office:value="0" calcext:value-type="float">
            <text:p>0</text:p>
          </table:table-cell>
          <table:table-cell table:style-name="ce62" table:formula="of:=[.AA71]/[.U71]" office:value-type="string" office:string-value="" calcext:value-type="error">
            <text:p>#DIV/0!</text:p>
          </table:table-cell>
          <table:table-cell table:style-name="ce55" table:formula="of:=[.AC27]+[.AC42]" office:value-type="float" office:value="0" calcext:value-type="float">
            <text:p>0</text:p>
          </table:table-cell>
          <table:table-cell table:style-name="ce55" table:formula="of:=[.AD27]+[.AD42]" office:value-type="float" office:value="0" calcext:value-type="float">
            <text:p>0</text:p>
          </table:table-cell>
          <table:table-cell table:style-name="ce69" table:formula="of:=[.AC71]=[.AD71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lifting</text:p>
          </table:table-cell>
          <table:table-cell table:style-name="ce51" office:value-type="string" calcext:value-type="string">
            <text:p>DM,OE</text:p>
          </table:table-cell>
          <table:table-cell table:style-name="ce55" table:formula="of:=[.U28]+[.U43]" office:value-type="float" office:value="0" calcext:value-type="float">
            <text:p>0</text:p>
          </table:table-cell>
          <table:table-cell table:style-name="ce68" table:formula="of:=[.V28]+[.V43]" office:value-type="float" office:value="0" calcext:value-type="float">
            <text:p>0</text:p>
          </table:table-cell>
          <table:table-cell table:style-name="ce55" table:formula="of:=[.W28]+[.W43]" office:value-type="float" office:value="0" calcext:value-type="float">
            <text:p>0</text:p>
          </table:table-cell>
          <table:table-cell table:style-name="ce55" table:formula="of:=[.X28]+[.X43]" office:value-type="float" office:value="0" calcext:value-type="float">
            <text:p>0</text:p>
          </table:table-cell>
          <table:table-cell table:style-name="ce55" table:formula="of:=[.Y28]+[.Y43]" office:value-type="float" office:value="0" calcext:value-type="float">
            <text:p>0</text:p>
          </table:table-cell>
          <table:table-cell table:style-name="ce55" table:formula="of:=[.Z28]+[.Z43]" office:value-type="float" office:value="0" calcext:value-type="float">
            <text:p>0</text:p>
          </table:table-cell>
          <table:table-cell table:style-name="ce55" table:formula="of:=[.AA28]+[.AA43]" office:value-type="float" office:value="0" calcext:value-type="float">
            <text:p>0</text:p>
          </table:table-cell>
          <table:table-cell table:style-name="ce62" table:formula="of:=[.AA72]/[.U72]" office:value-type="string" office:string-value="" calcext:value-type="error">
            <text:p>#DIV/0!</text:p>
          </table:table-cell>
          <table:table-cell table:style-name="ce55" table:formula="of:=[.AC28]+[.AC43]" office:value-type="float" office:value="0" calcext:value-type="float">
            <text:p>0</text:p>
          </table:table-cell>
          <table:table-cell table:style-name="ce55" table:formula="of:=[.AD28]+[.AD43]" office:value-type="float" office:value="0" calcext:value-type="float">
            <text:p>0</text:p>
          </table:table-cell>
          <table:table-cell table:style-name="ce69" table:formula="of:=[.AC72]=[.AD72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QCEC</text:p>
          </table:table-cell>
          <table:table-cell table:style-name="ce50" office:value-type="string" calcext:value-type="string">
            <text:p>1.8.1</text:p>
          </table:table-cell>
          <table:table-cell table:style-name="ce54" office:value-type="string" calcext:value-type="string">
            <text:p>standalone</text:p>
          </table:table-cell>
          <table:table-cell table:style-name="ce51" office:value-type="string" calcext:value-type="string">
            <text:p>DM,OE</text:p>
          </table:table-cell>
          <table:table-cell table:style-name="ce55" table:formula="of:=[.U29]+[.U44]" office:value-type="float" office:value="0" calcext:value-type="float">
            <text:p>0</text:p>
          </table:table-cell>
          <table:table-cell table:style-name="ce68" table:formula="of:=[.V29]+[.V44]" office:value-type="float" office:value="0" calcext:value-type="float">
            <text:p>0</text:p>
          </table:table-cell>
          <table:table-cell table:style-name="ce55" table:formula="of:=[.W29]+[.W44]" office:value-type="float" office:value="0" calcext:value-type="float">
            <text:p>0</text:p>
          </table:table-cell>
          <table:table-cell table:style-name="ce55" table:formula="of:=[.X29]+[.X44]" office:value-type="float" office:value="0" calcext:value-type="float">
            <text:p>0</text:p>
          </table:table-cell>
          <table:table-cell table:style-name="ce55" table:formula="of:=[.Y29]+[.Y44]" office:value-type="float" office:value="0" calcext:value-type="float">
            <text:p>0</text:p>
          </table:table-cell>
          <table:table-cell table:style-name="ce55" table:formula="of:=[.Z29]+[.Z44]" office:value-type="float" office:value="0" calcext:value-type="float">
            <text:p>0</text:p>
          </table:table-cell>
          <table:table-cell table:style-name="ce55" table:formula="of:=[.AA29]+[.AA44]" office:value-type="float" office:value="0" calcext:value-type="float">
            <text:p>0</text:p>
          </table:table-cell>
          <table:table-cell table:style-name="ce62" table:formula="of:=[.AA73]/[.U73]" office:value-type="string" office:string-value="" calcext:value-type="error">
            <text:p>#DIV/0!</text:p>
          </table:table-cell>
          <table:table-cell table:style-name="ce55" table:formula="of:=[.AC29]+[.AC44]" office:value-type="float" office:value="0" calcext:value-type="float">
            <text:p>0</text:p>
          </table:table-cell>
          <table:table-cell table:style-name="ce55" table:formula="of:=[.AD29]+[.AD44]" office:value-type="float" office:value="0" calcext:value-type="float">
            <text:p>0</text:p>
          </table:table-cell>
          <table:table-cell table:style-name="ce69" table:formula="of:=[.AC73]=[.AD73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NoGP,NoIF,VR</text:p>
          </table:table-cell>
          <table:table-cell table:style-name="ce55" table:formula="of:=[.U30]+[.U45]+[.U7]+[.U15]+[.U53]" office:value-type="float" office:value="0" calcext:value-type="float">
            <text:p>0</text:p>
          </table:table-cell>
          <table:table-cell table:style-name="ce68" table:formula="of:=[.V30]+[.V45]+[.V7]+[.V15]+[.V53]" office:value-type="float" office:value="0" calcext:value-type="float">
            <text:p>0</text:p>
          </table:table-cell>
          <table:table-cell table:style-name="ce55" table:formula="of:=[.W30]+[.W45]+[.W7]+[.W15]+[.W53]" office:value-type="float" office:value="0" calcext:value-type="float">
            <text:p>0</text:p>
          </table:table-cell>
          <table:table-cell table:style-name="ce55" table:formula="of:=[.X30]+[.X45]+[.X7]+[.X15]+[.X53]" office:value-type="float" office:value="0" calcext:value-type="float">
            <text:p>0</text:p>
          </table:table-cell>
          <table:table-cell table:style-name="ce55" table:formula="of:=[.Y30]+[.Y45]+[.Y7]+[.Y15]+[.Y53]" office:value-type="float" office:value="0" calcext:value-type="float">
            <text:p>0</text:p>
          </table:table-cell>
          <table:table-cell table:style-name="ce55" table:formula="of:=[.Z30]+[.Z45]+[.Z7]+[.Z15]+[.Z53]" office:value-type="float" office:value="0" calcext:value-type="float">
            <text:p>0</text:p>
          </table:table-cell>
          <table:table-cell table:style-name="ce55" table:formula="of:=[.AA30]+[.AA45]+[.AA7]+[.AA15]+[.AA53]" office:value-type="float" office:value="0" calcext:value-type="float">
            <text:p>0</text:p>
          </table:table-cell>
          <table:table-cell table:style-name="ce62" table:formula="of:=[.AA74]/[.U74]" office:value-type="string" office:string-value="" calcext:value-type="error">
            <text:p>#DIV/0!</text:p>
          </table:table-cell>
          <table:table-cell table:style-name="ce55" table:formula="of:=[.AC30]+[.AC45]+[.AC7]+[.AC15]+[.AC53]" office:value-type="float" office:value="0" calcext:value-type="float">
            <text:p>0</text:p>
          </table:table-cell>
          <table:table-cell table:style-name="ce55" table:formula="of:=[.AD30]+[.AD45]+[.AD7]+[.AD15]+[.AD53]" office:value-type="float" office:value="0" calcext:value-type="float">
            <text:p>0</text:p>
          </table:table-cell>
          <table:table-cell table:style-name="ce69" table:formula="of:=[.AC74]=[.AD74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  <table:table-cell table:style-name="ce44" office:value-type="string" calcext:value-type="string">
            <text:p>SQbricks</text:p>
          </table:table-cell>
          <table:table-cell table:style-name="ce50" office:value-type="string" calcext:value-type="string">
            <text:p>2025</text:p>
          </table:table-cell>
          <table:table-cell table:style-name="ce54" office:value-type="string" calcext:value-type="string">
            <text:p>lifting</text:p>
          </table:table-cell>
          <table:table-cell table:style-name="ce54" office:value-type="string" calcext:value-type="string">
            <text:p>NoIF,VR,Parallel</text:p>
          </table:table-cell>
          <table:table-cell table:style-name="ce55" table:formula="of:=[.U31]+[.U46]+[.U8]+[.U16]+[.U54]+[.U60]" office:value-type="float" office:value="0" calcext:value-type="float">
            <text:p>0</text:p>
          </table:table-cell>
          <table:table-cell table:style-name="ce68" table:formula="of:=[.V31]+[.V46]+[.V8]+[.V16]+[.V54]+[.V60]" office:value-type="float" office:value="0" calcext:value-type="float">
            <text:p>0</text:p>
          </table:table-cell>
          <table:table-cell table:style-name="ce55" table:formula="of:=[.W31]+[.W46]+[.W8]+[.W16]+[.W54]+[.W60]" office:value-type="float" office:value="0" calcext:value-type="float">
            <text:p>0</text:p>
          </table:table-cell>
          <table:table-cell table:style-name="ce55" table:formula="of:=[.X31]+[.X46]+[.X8]+[.X16]+[.X54]+[.X60]" office:value-type="float" office:value="0" calcext:value-type="float">
            <text:p>0</text:p>
          </table:table-cell>
          <table:table-cell table:style-name="ce55" table:formula="of:=[.Y31]+[.Y46]+[.Y8]+[.Y16]+[.Y54]+[.Y60]" office:value-type="float" office:value="0" calcext:value-type="float">
            <text:p>0</text:p>
          </table:table-cell>
          <table:table-cell table:style-name="ce55" table:formula="of:=[.Z31]+[.Z46]+[.Z8]+[.Z16]+[.Z54]+[.Z60]" office:value-type="float" office:value="0" calcext:value-type="float">
            <text:p>0</text:p>
          </table:table-cell>
          <table:table-cell table:style-name="ce55" table:formula="of:=[.AA31]+[.AA46]+[.AA8]+[.AA16]+[.AA54]+[.AA60]" office:value-type="float" office:value="0" calcext:value-type="float">
            <text:p>0</text:p>
          </table:table-cell>
          <table:table-cell table:style-name="ce62" table:formula="of:=[.AA75]/[.U75]" office:value-type="string" office:string-value="" calcext:value-type="error">
            <text:p>#DIV/0!</text:p>
          </table:table-cell>
          <table:table-cell table:style-name="ce55" table:formula="of:=[.AC31]+[.AC46]+[.AC8]+[.AC16]+[.AC54]+[.AC60]" office:value-type="float" office:value="0" calcext:value-type="float">
            <text:p>0</text:p>
          </table:table-cell>
          <table:table-cell table:style-name="ce55" table:formula="of:=[.AD31]+[.AD46]+[.AD8]+[.AD16]+[.AD54]+[.AD60]" office:value-type="float" office:value="0" calcext:value-type="float">
            <text:p>0</text:p>
          </table:table-cell>
          <table:table-cell table:style-name="ce69" table:formula="of:=[.AC75]=[.AD75]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7"/>
          <table:table-cell table:style-name="Default"/>
          <table:table-cell table:number-columns-repeated="24"/>
        </table:table-row>
        <table:table-row table:style-name="ro1" table:number-rows-repeated="4">
          <table:table-cell table:style-name="Default" table:number-columns-repeated="4"/>
          <table:table-cell table:number-columns-repeated="7"/>
          <table:table-cell table:style-name="Default"/>
          <table:table-cell table:number-columns-repeated="3"/>
          <table:table-cell table:style-name="ce55"/>
          <table:table-cell table:number-columns-repeated="20"/>
        </table:table-row>
        <table:table-row table:style-name="ro1" table:number-rows-repeated="12">
          <table:table-cell table:style-name="Default" table:number-columns-repeated="4"/>
          <table:table-cell table:number-columns-repeated="7"/>
          <table:table-cell table:style-name="Default"/>
          <table:table-cell table:number-columns-repeated="24"/>
        </table:table-row>
        <table:table-row table:style-name="ro1" table:number-rows-repeated="5">
          <table:table-cell table:style-name="Default" table:number-columns-repeated="4"/>
          <table:table-cell table:number-columns-repeated="7"/>
          <table:table-cell table:style-name="Default"/>
          <table:table-cell table:number-columns-repeated="3"/>
          <table:table-cell table:style-name="ce55"/>
          <table:table-cell table:number-columns-repeated="20"/>
        </table:table-row>
        <table:table-row table:style-name="ro1" table:number-rows-repeated="55">
          <table:table-cell table:style-name="Default" table:number-columns-repeated="4"/>
          <table:table-cell table:number-columns-repeated="7"/>
          <table:table-cell table:style-name="Default"/>
          <table:table-cell table:number-columns-repeated="24"/>
        </table:table-row>
        <table:table-row table:style-name="ro1" table:number-rows-repeated="1048422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totals.AC6:totals.AD6 totals.AE4:totals.AE8 totals.AE12:totals.AE16 totals.AE19:totals.AE31 totals.AE34:totals.AE46 totals.AE57:totals.AE60 totals.AE50:totals.AE54 totals.AE63:totals.AE75 totals.O26:totals.O30 totals.O37:totals.O38 totals.O45:totals.O63 totals.O4:totals.O14 totals.O16:totals.O24">
            <calcext:condition calcext:apply-style-name="Good" calcext:value="=1" calcext:base-cell-address="totals.O4"/>
            <calcext:condition calcext:apply-style-name="Bad" calcext:value="=0" calcext:base-cell-address="totals.O4"/>
            <calcext:condition calcext:apply-style-name="Accent" calcext:value="=0" calcext:base-cell-address="totals.O4"/>
          </calcext:conditional-format>
          <calcext:conditional-format calcext:target-range-address="totals.H6:totals.H14 totals.H19:totals.H30 totals.H36:totals.H38 totals.H44:totals.H63">
            <calcext:condition calcext:apply-style-name="Bad" calcext:value="&gt;0" calcext:base-cell-address="totals.H6"/>
          </calcext:conditional-format>
          <calcext:conditional-format calcext:target-range-address="totals.V7:totals.V8 totals.V15:totals.V16 totals.V23:totals.V31 totals.V38:totals.V46 totals.V53:totals.V54 totals.V60:totals.V60 totals.V67:totals.V75">
            <calcext:condition calcext:apply-style-name="Bad" calcext:value="&gt;0" calcext:base-cell-address="totals.V7"/>
          </calcext:conditional-format>
        </calcext:conditional-formats>
      </table:table>
      <table:named-expressions/>
      <table:database-ranges>
        <table:database-range table:name="__Anonymous_Sheet_DB__0" table:target-range-address="'O(U)-U'.A2:'O(U)-U'.M27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T(U)-U'.A2:'T(U)-U'.M1218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'U-DC'.A2:'U-DC'.N1437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3" table:target-range-address="'DC-Q(DC)'.A2:'DC-Q(DC)'.M880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4" table:target-range-address="'O(DC)-Q(DC)'.A2:'O(DC)-Q(DC)'.R177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  <table:database-range table:name="__Anonymous_Sheet_DB__5" table:target-range-address="'O(U)-T(U)'.A2:'O(U)-T(U)'.M694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6" table:target-range-address="'sanity-unit'.A2:'sanity-unit'.S350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7" table:target-range-address="'sanity-hybrid'.A2:'sanity-hybrid'.S210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8" table:target-range-address="'sanity-partial'.A2:'sanity-partial'.S27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9" table:target-range-address="totals.A20:totals.O3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c0c0c0"/>
    </style:style>
    <style:style style:name="Untitled2" style:family="table-cell" style:parent-style-name="Default">
      <style:table-cell-properties fo:background-color="#c0c0c0"/>
    </style:style>
    <style:style style:name="Untitled3" style:family="table-cell" style:parent-style-name="Default">
      <style:table-cell-properties fo:background-color="#c0c0c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0T11:11:41.721557789</dc:date>
    <meta:editing-duration>P24DT3H32S</meta:editing-duration>
    <meta:editing-cycles>1833</meta:editing-cycles>
    <meta:document-statistic meta:table-count="10" meta:cell-count="1301" meta:object-count="0"/>
  </office:meta>
</office:document-meta>
</file>